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3400002509000017F39BDA7D3B.wmf" manifest:media-type=""/>
  <manifest:file-entry manifest:full-path="Pictures/20000126000042DA000015FF8B9D0B8D.wmf" manifest:media-type=""/>
  <manifest:file-entry manifest:full-path="Pictures/2000007B00001DBE000019F668D86599.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ottoTitolo_20_1">
      <style:paragraph-properties fo:text-align="end" style:justify-single-word="false"/>
      <style:text-properties style:font-name="Arial Black" fo:font-size="30pt" fo:language="en" fo:country="GB" fo:text-shadow="1pt 1pt" style:font-size-asian="30pt" style:font-name-complex="Arial Black"/>
    </style:style>
    <style:style style:name="P2" style:family="paragraph" style:parent-style-name="Corpo_20_del_20_testo_20_no_20_Rientro">
      <style:text-properties fo:language="en" fo:country="GB"/>
    </style:style>
    <style:style style:name="P3" style:family="paragraph" style:parent-style-name="Corpo_20_del_20_testo_20_no_20_Rientro">
      <style:text-properties fo:language="de" fo:country="DE"/>
    </style:style>
    <style:style style:name="P4" style:family="paragraph" style:parent-style-name="Corpo_20_del_20_testo_20_no_20_Rientro">
      <style:text-properties officeooo:paragraph-rsid="00026ea7"/>
    </style:style>
    <style:style style:name="P5" style:family="paragraph" style:parent-style-name="Corpo_20_del_20_testo_20_no_20_Rientro">
      <style:text-properties officeooo:paragraph-rsid="0005bf3b"/>
    </style:style>
    <style:style style:name="P6" style:family="paragraph" style:parent-style-name="Corpo_20_del_20_testo_20_no_20_Rientro">
      <style:text-properties officeooo:paragraph-rsid="000694b5"/>
    </style:style>
    <style:style style:name="P7" style:family="paragraph" style:parent-style-name="Corpo_20_del_20_testo_20_no_20_Rientro">
      <style:text-properties officeooo:paragraph-rsid="0008415b"/>
    </style:style>
    <style:style style:name="P8" style:family="paragraph" style:parent-style-name="Corpo_20_del_20_testo_20_no_20_Rientro">
      <style:text-properties officeooo:paragraph-rsid="000a2401"/>
    </style:style>
    <style:style style:name="P9" style:family="paragraph" style:parent-style-name="Corpo_20_del_20_testo_20_no_20_Rientro" style:master-page-name="">
      <style:paragraph-properties fo:margin-top="0.101cm" fo:margin-bottom="0cm" loext:contextual-spacing="false" style:page-number="auto"/>
      <style:text-properties officeooo:paragraph-rsid="000694b5"/>
    </style:style>
    <style:style style:name="P10" style:family="paragraph" style:parent-style-name="Corpo_20_del_20_testo_20_no_20_Rientro">
      <style:paragraph-properties fo:margin-top="0.101cm" fo:margin-bottom="0cm" loext:contextual-spacing="false"/>
      <style:text-properties officeooo:paragraph-rsid="000694b5"/>
    </style:style>
    <style:style style:name="P11" style:family="paragraph" style:parent-style-name="Codice_20_C_23__20_iniziale">
      <style:paragraph-properties fo:margin-top="0.101cm" fo:margin-bottom="0cm" loext:contextual-spacing="false"/>
    </style:style>
    <style:style style:name="P12" style:family="paragraph" style:parent-style-name="Codice_20_C_23_">
      <style:text-properties fo:language="en" fo:country="GB"/>
    </style:style>
    <style:style style:name="P13" style:family="paragraph" style:parent-style-name="Codice_20_C_23_">
      <style:paragraph-properties fo:line-height="120%"/>
    </style:style>
    <style:style style:name="P14" style:family="paragraph" style:parent-style-name="Codice_20_C_23_">
      <style:paragraph-properties fo:line-height="120%"/>
      <style:text-properties fo:font-style="italic" style:font-style-asian="italic"/>
    </style:style>
    <style:style style:name="P15" style:family="paragraph" style:parent-style-name="Codice_20_C_23_">
      <style:paragraph-properties fo:margin-left="0cm" fo:margin-right="0cm" fo:text-indent="0.75cm" style:auto-text-indent="false"/>
    </style:style>
    <style:style style:name="P16" style:family="paragraph" style:parent-style-name="Text_20_body">
      <style:text-properties fo:language="en" fo:country="GB"/>
    </style:style>
    <style:style style:name="P17" style:family="paragraph" style:parent-style-name="Text_20_body">
      <style:paragraph-properties fo:text-align="center" style:justify-single-word="false"/>
    </style:style>
    <style:style style:name="P18" style:family="paragraph" style:parent-style-name="Text_20_body">
      <style:text-properties officeooo:paragraph-rsid="000305f5"/>
    </style:style>
    <style:style style:name="P19" style:family="paragraph" style:parent-style-name="Codice_20_C_23__20_iniziale">
      <style:paragraph-properties fo:line-height="120%"/>
    </style:style>
    <style:style style:name="P20" style:family="paragraph" style:parent-style-name="Codice_20_C_23__20_iniziale">
      <style:text-properties fo:language="en" fo:country="GB"/>
    </style:style>
    <style:style style:name="P21" style:family="paragraph" style:parent-style-name="Codice_20_C_23__20_iniziale">
      <style:paragraph-properties fo:margin-left="2cm" fo:margin-right="0cm" fo:text-indent="0cm" style:auto-text-indent="false"/>
    </style:style>
    <style:style style:name="P22" style:family="paragraph" style:parent-style-name="Codice_20_C_23__20_iniziale">
      <style:paragraph-properties fo:margin-left="2cm" fo:margin-right="0cm" fo:text-indent="0cm" style:auto-text-indent="false"/>
      <style:text-properties fo:font-size="12pt" fo:font-weight="bold" style:font-size-asian="12pt" style:font-weight-asian="bold"/>
    </style:style>
    <style:style style:name="P23" style:family="paragraph" style:parent-style-name="Codice_20_C_23__20_iniziale">
      <style:paragraph-properties fo:margin-left="2cm" fo:margin-right="0cm" fo:text-indent="0cm" style:auto-text-indent="false"/>
      <style:text-properties fo:font-size="12pt" fo:language="de" fo:country="DE" fo:font-weight="bold" style:font-size-asian="12pt" style:font-weight-asian="bold"/>
    </style:style>
    <style:style style:name="P24" style:family="paragraph" style:parent-style-name="Codice_20_C_23__20_iniziale">
      <style:paragraph-properties fo:margin-left="2cm" fo:margin-right="0cm" fo:text-indent="0cm" style:auto-text-indent="false"/>
      <style:text-properties fo:font-size="14pt" fo:font-weight="bold" style:font-size-asian="14pt" style:font-weight-asian="bold"/>
    </style:style>
    <style:style style:name="P25" style:family="paragraph" style:parent-style-name="Codice_20_C_23__20_iniziale">
      <style:paragraph-properties fo:margin-left="2cm" fo:margin-right="0cm" fo:margin-top="0cm" fo:margin-bottom="0cm" loext:contextual-spacing="false" fo:text-indent="0cm" style:auto-text-indent="false"/>
      <style:text-properties fo:font-size="12pt" fo:font-weight="bold" style:font-size-asian="12pt" style:font-weight-asian="bold"/>
    </style:style>
    <style:style style:name="P26" style:family="paragraph" style:parent-style-name="Codice_20_C_23__20_iniziale">
      <style:paragraph-properties fo:margin-left="2cm" fo:margin-right="0cm" fo:margin-top="0cm" fo:margin-bottom="0cm" loext:contextual-spacing="false" fo:text-indent="0cm" style:auto-text-indent="false"/>
      <style:text-properties fo:font-size="12pt" fo:language="de" fo:country="DE" fo:font-weight="bold" style:font-size-asian="12pt" style:font-weight-asian="bold"/>
    </style:style>
    <style:style style:name="P27" style:family="paragraph" style:parent-style-name="Contents_20_3">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999cm" style:type="right" style:leader-style="dotted" style:leader-text="."/>
        </style:tab-stops>
      </style:paragraph-properties>
    </style:style>
    <style:style style:name="P29" style:family="paragraph" style:parent-style-name="Standard" style:master-page-name="Converti_20_1">
      <style:paragraph-properties style:page-number="auto"/>
    </style:style>
    <style:style style:name="P30" style:family="paragraph" style:parent-style-name="Heading_20_2" style:master-page-name="Converti_20_3">
      <style:paragraph-properties style:page-number="auto"/>
    </style:style>
    <style:style style:name="P31" style:family="paragraph" style:parent-style-name="Heading_20_3">
      <style:paragraph-properties fo:margin-top="0cm" fo:margin-bottom="0.106cm" loext:contextual-spacing="false" fo:break-before="page" fo:padding-left="0cm" fo:padding-right="0cm" fo:padding-top="0.035cm" fo:padding-bottom="0.035cm" fo:border-left="none" fo:border-right="none" fo:border-top="0.51pt solid #000000" fo:border-bottom="0.51pt solid #000000"/>
    </style:style>
    <style:style style:name="P32" style:family="paragraph" style:parent-style-name="Heading_20_3">
      <style:paragraph-properties fo:margin-top="0cm" fo:margin-bottom="0.106cm" loext:contextual-spacing="false" fo:padding-left="0cm" fo:padding-right="0cm" fo:padding-top="0.035cm" fo:padding-bottom="0.035cm" fo:border-left="none" fo:border-right="none" fo:border-top="0.51pt solid #000000" fo:border-bottom="0.51pt solid #000000"/>
    </style:style>
    <style:style style:name="P33" style:family="paragraph" style:parent-style-name="Heading_20_3">
      <style:paragraph-properties fo:margin-top="0.847cm" fo:margin-bottom="0.106cm" loext:contextual-spacing="false" fo:padding-left="0cm" fo:padding-right="0cm" fo:padding-top="0.035cm" fo:padding-bottom="0.035cm" fo:border-left="none" fo:border-right="none" fo:border-top="0.51pt solid #000000" fo:border-bottom="0.51pt solid #000000"/>
    </style:style>
    <style:style style:name="P34" style:family="paragraph" style:parent-style-name="Heading_20_3">
      <style:paragraph-properties fo:margin-top="0.847cm" fo:margin-bottom="0.106cm" loext:contextual-spacing="false" fo:text-align="justify" style:justify-single-word="false" fo:padding-left="0cm" fo:padding-right="0cm" fo:padding-top="0.035cm" fo:padding-bottom="0.035cm" fo:border-left="none" fo:border-right="none" fo:border-top="0.51pt solid #000000" fo:border-bottom="0.51pt solid #000000"/>
    </style:style>
    <style:style style:name="P35" style:family="paragraph" style:parent-style-name="Heading_20_3">
      <style:paragraph-properties fo:margin-top="0.635cm" fo:margin-bottom="0.106cm" loext:contextual-spacing="false" fo:padding-left="0cm" fo:padding-right="0cm" fo:padding-top="0.035cm" fo:padding-bottom="0.035cm" fo:border-left="none" fo:border-right="none" fo:border-top="0.51pt solid #000000" fo:border-bottom="0.51pt solid #000000"/>
    </style:style>
    <style:style style:name="P36" style:family="paragraph" style:parent-style-name="Heading_20_3">
      <style:paragraph-properties fo:margin-top="0.7cm" fo:margin-bottom="0.109cm" loext:contextual-spacing="false" fo:padding-left="0cm" fo:padding-right="0cm" fo:padding-top="0.035cm" fo:padding-bottom="0.035cm" fo:border-left="none" fo:border-right="none" fo:border-top="0.51pt solid #000000" fo:border-bottom="0.51pt solid #000000"/>
    </style:style>
    <style:style style:name="P37" style:family="paragraph" style:parent-style-name="SottoTitolo_20_1" style:master-page-name="Standard">
      <style:paragraph-properties fo:text-align="end" style:justify-single-word="false" style:page-number="auto"/>
      <style:text-properties style:font-name="Arial Black" fo:font-size="44pt" fo:language="en" fo:country="GB" fo:text-shadow="1pt 1pt" style:font-size-asian="44pt" style:font-name-complex="Arial Black"/>
    </style:style>
    <style:style style:name="T1" style:family="text">
      <style:text-properties fo:language="en" fo:country="GB"/>
    </style:style>
    <style:style style:name="T2" style:family="text">
      <style:text-properties fo:language="en" fo:country="GB" officeooo:rsid="0003dc8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3dc8d" style:font-weight-asian="bold" style:font-weight-complex="bold"/>
    </style:style>
    <style:style style:name="T6" style:family="text">
      <style:text-properties fo:font-weight="bold" officeooo:rsid="0005bf3b" style:font-weight-asian="bold" style:font-weight-complex="bold"/>
    </style:style>
    <style:style style:name="T7" style:family="text">
      <style:text-properties fo:font-weight="bold" officeooo:rsid="000694b5" style:font-weight-asian="bold" style:font-weight-complex="bold"/>
    </style:style>
    <style:style style:name="T8" style:family="text">
      <style:text-properties fo:font-weight="bold" officeooo:rsid="0008415b" style:font-weight-asian="bold" style:font-weight-complex="bold"/>
    </style:style>
    <style:style style:name="T9" style:family="text">
      <style:text-properties fo:font-size="12pt" fo:font-weight="bold" style:font-size-asian="12pt" style:font-weight-asian="bold"/>
    </style:style>
    <style:style style:name="T10" style:family="text">
      <style:text-properties fo:font-size="12pt" fo:font-style="italic" fo:font-weight="bold" style:font-size-asian="12pt" style:font-style-asian="italic" style:font-weight-asian="bold"/>
    </style:style>
    <style:style style:name="T11" style:family="text">
      <style:text-properties fo:font-style="italic" style:font-style-asian="italic"/>
    </style:style>
    <style:style style:name="T12" style:family="text">
      <style:text-properties style:text-position="sub 58%"/>
    </style:style>
    <style:style style:name="T13" style:family="text">
      <style:text-properties fo:font-size="18pt" style:font-size-asian="18pt"/>
    </style:style>
    <style:style style:name="T14" style:family="text">
      <style:text-properties fo:font-size="14pt" style:font-size-asian="14pt"/>
    </style:style>
    <style:style style:name="T15" style:family="text">
      <style:text-properties fo:font-size="14pt" fo:font-weight="bold" style:font-size-asian="14pt" style:font-weight-asian="bold"/>
    </style:style>
    <style:style style:name="T16" style:family="text">
      <style:text-properties fo:font-size="14pt" fo:font-style="italic" fo:font-weight="bold" style:font-size-asian="14pt" style:font-style-asian="italic" style:font-weight-asian="bold"/>
    </style:style>
    <style:style style:name="T17" style:family="text">
      <style:text-properties officeooo:rsid="00026ea7"/>
    </style:style>
    <style:style style:name="T18" style:family="text">
      <style:text-properties officeooo:rsid="000305f5"/>
    </style:style>
    <style:style style:name="T19" style:family="text">
      <style:text-properties officeooo:rsid="0003dc8d"/>
    </style:style>
    <style:style style:name="T20" style:family="text">
      <style:text-properties officeooo:rsid="0005bf3b"/>
    </style:style>
    <style:style style:name="T21" style:family="text">
      <style:text-properties style:text-underline-style="solid" style:text-underline-width="auto" style:text-underline-color="font-color"/>
    </style:style>
    <style:style style:name="T22" style:family="text">
      <style:text-properties officeooo:rsid="000694b5"/>
    </style:style>
    <style:style style:name="T23" style:family="text">
      <style:text-properties officeooo:rsid="0008415b"/>
    </style:style>
    <style:style style:name="T24" style:family="text">
      <style:text-properties officeooo:rsid="000bc7f8"/>
    </style:style>
    <style:style style:name="T25"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asyCPU </text:p>
      <text:p text:style-name="P1">Assembly reference</text:p>
      <text:p text:style-name="P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Text_20_body"/>
      <text:p text:style-name="P29"/>
      <text:table-of-content text:style-name="Sect1"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8">Premessa<text:tab/><text:a xlink:type="simple" xlink:href="#__RefHeading___Toc99190750">5</text:a></text:p>
          <text:p text:style-name="P28">Struttura della CPU<text:tab/><text:a xlink:type="simple" xlink:href="#__RefHeading___Toc99190751">6</text:a></text:p>
          <text:p text:style-name="P27">Artimetica<text:tab/><text:a xlink:type="simple" xlink:href="#__RefHeading___Toc99190752">6</text:a></text:p>
          <text:p text:style-name="P27">Memoria dati<text:tab/><text:a xlink:type="simple" xlink:href="#__RefHeading___Toc99190753">6</text:a></text:p>
          <text:p text:style-name="P27">Registri<text:tab/><text:a xlink:type="simple" xlink:href="#__RefHeading___Toc99190754">6</text:a></text:p>
          <text:p text:style-name="P27">Modelli di indirizzamento<text:tab/><text:a xlink:type="simple" xlink:href="#__RefHeading___Toc99190755">7</text:a></text:p>
          <text:p text:style-name="P27">Gestione dello stack<text:tab/><text:a xlink:type="simple" xlink:href="#__RefHeading___Toc99190756">8</text:a></text:p>
          <text:p text:style-name="P27">Flags<text:tab/><text:a xlink:type="simple" xlink:href="#__RefHeading___Toc99190757">9</text:a></text:p>
          <text:p text:style-name="P28">Set di istruzioni<text:tab/><text:a xlink:type="simple" xlink:href="#__RefHeading___Toc99190758">10</text:a></text:p>
          <text:p text:style-name="P27">Descrizione generale delle istruzioni<text:tab/><text:a xlink:type="simple" xlink:href="#__RefHeading___Toc99190759">10</text:a></text:p>
          <text:p text:style-name="P27">Modalità di descrizione delle istruzioni<text:tab/><text:a xlink:type="simple" xlink:href="#__RefHeading___Toc99190760">10</text:a></text:p>
          <text:p text:style-name="P27">ADD – Addizione<text:tab/><text:a xlink:type="simple" xlink:href="#__RefHeading___Toc99190761">11</text:a></text:p>
          <text:p text:style-name="P27">AND – Moltiplicazione logica<text:tab/><text:a xlink:type="simple" xlink:href="#__RefHeading___Toc99190762">11</text:a></text:p>
          <text:p text:style-name="P27">CALL – Chiamata di una procedura<text:tab/><text:a xlink:type="simple" xlink:href="#__RefHeading___Toc99190763">12</text:a></text:p>
          <text:p text:style-name="P27">CMP – Confronto<text:tab/><text:a xlink:type="simple" xlink:href="#__RefHeading___Toc99190764">12</text:a></text:p>
          <text:p text:style-name="P27">DEC – Decremento<text:tab/><text:a xlink:type="simple" xlink:href="#__RefHeading___Toc99190765">13</text:a></text:p>
          <text:p text:style-name="P27">DIV – Divisione intera<text:tab/><text:a xlink:type="simple" xlink:href="#__RefHeading___Toc99190766">13</text:a></text:p>
          <text:p text:style-name="P27">INC – Incremento<text:tab/><text:a xlink:type="simple" xlink:href="#__RefHeading___Toc99190767">14</text:a></text:p>
          <text:p text:style-name="P27">JCXZ – Salto se CX è zero<text:tab/><text:a xlink:type="simple" xlink:href="#__RefHeading___Toc99190768">14</text:a></text:p>
          <text:p text:style-name="P27">JE – Salto se uguale<text:tab/><text:a xlink:type="simple" xlink:href="#__RefHeading___Toc99190769">15</text:a></text:p>
          <text:p text:style-name="P27">JG – Salto se maggiore<text:tab/><text:a xlink:type="simple" xlink:href="#__RefHeading___Toc99190770">15</text:a></text:p>
          <text:p text:style-name="P27">JGE – Salto se maggiore o uguale<text:tab/><text:a xlink:type="simple" xlink:href="#__RefHeading___Toc99190771">16</text:a></text:p>
          <text:p text:style-name="P27">JL – Salto se minore<text:tab/><text:a xlink:type="simple" xlink:href="#__RefHeading___Toc99190772">16</text:a></text:p>
          <text:p text:style-name="P27">JLE – Salto se minore o uguale<text:tab/><text:a xlink:type="simple" xlink:href="#__RefHeading___Toc99190773">17</text:a></text:p>
          <text:p text:style-name="P27">JMP – Salto incondizionato<text:tab/><text:a xlink:type="simple" xlink:href="#__RefHeading___Toc99190774">17</text:a></text:p>
          <text:p text:style-name="P27">JNE – Salto se diverso<text:tab/><text:a xlink:type="simple" xlink:href="#__RefHeading___Toc99190775">18</text:a></text:p>
          <text:p text:style-name="P27">JNO – Salto se non overflow<text:tab/><text:a xlink:type="simple" xlink:href="#__RefHeading___Toc99190776">18</text:a></text:p>
          <text:p text:style-name="P27">JNS – Salto se il flag di segno è 0<text:tab/><text:a xlink:type="simple" xlink:href="#__RefHeading___Toc99190777">19</text:a></text:p>
          <text:p text:style-name="P27">JO – Salto se overflow<text:tab/><text:a xlink:type="simple" xlink:href="#__RefHeading___Toc99190778">19</text:a></text:p>
          <text:p text:style-name="P27">JS – Salto se il flag di segno è 1<text:tab/><text:a xlink:type="simple" xlink:href="#__RefHeading___Toc99190779">20</text:a></text:p>
          <text:p text:style-name="P27">MOV – Trasferimento<text:tab/><text:a xlink:type="simple" xlink:href="#__RefHeading___Toc99190780">20</text:a></text:p>
          <text:p text:style-name="P27">MOVS – Trasferimento di una sequenza<text:tab/><text:a xlink:type="simple" xlink:href="#__RefHeading___Toc99190781">21</text:a></text:p>
          <text:p text:style-name="P27">MUL – Moltiplicazione intera<text:tab/><text:a xlink:type="simple" xlink:href="#__RefHeading___Toc99190782">21</text:a></text:p>
          <text:p text:style-name="P27">NEG – Negazione (formazione del complemento a 2)<text:tab/><text:a xlink:type="simple" xlink:href="#__RefHeading___Toc99190783">22</text:a></text:p>
          <text:p text:style-name="P27">NOP – Nessuna operazione<text:tab/><text:a xlink:type="simple" xlink:href="#__RefHeading___Toc99190784">22</text:a></text:p>
          <text:p text:style-name="P27">NOT – Negazione logica (formazione del complemento a 1)<text:tab/><text:a xlink:type="simple" xlink:href="#__RefHeading___Toc99190785">23</text:a></text:p>
          <text:p text:style-name="P27">POP – Prelevamento dallo stack<text:tab/><text:a xlink:type="simple" xlink:href="#__RefHeading___Toc99190786">23</text:a></text:p>
          <text:p text:style-name="P27">POPF – Prelevamento del registro dei flag dallo stack<text:tab/><text:a xlink:type="simple" xlink:href="#__RefHeading___Toc99190787">24</text:a></text:p>
          <text:p text:style-name="P27">PUSH – Deposito di un valore nello stack<text:tab/><text:a xlink:type="simple" xlink:href="#__RefHeading___Toc99190788">24</text:a></text:p>
          <text:p text:style-name="P27">PUSHF – Deposito del registro dei flag nello stack<text:tab/><text:a xlink:type="simple" xlink:href="#__RefHeading___Toc99190789">25</text:a></text:p>
          <text:p text:style-name="P27">RET – Ritorno da una procedura<text:tab/><text:a xlink:type="simple" xlink:href="#__RefHeading___Toc99190790">25</text:a></text:p>
          <text:p text:style-name="P27">SHL – Shift logico a sinistra<text:tab/><text:a xlink:type="simple" xlink:href="#__RefHeading___Toc99190791">26</text:a></text:p>
          <text:p text:style-name="P27">SHR – Shift logico a destra<text:tab/><text:a xlink:type="simple" xlink:href="#__RefHeading___Toc99190792">26</text:a></text:p>
          <text:p text:style-name="P27">STOP – Arresta la CPU<text:tab/><text:a xlink:type="simple" xlink:href="#__RefHeading___Toc99190793">27</text:a></text:p>
          <text:p text:style-name="P27">SUB – Sottrazione<text:tab/><text:a xlink:type="simple" xlink:href="#__RefHeading___Toc99190794">27</text:a></text:p>
          <text:p text:style-name="P27">XOR – Or esclusivo<text:tab/><text:a xlink:type="simple" xlink:href="#__RefHeading___Toc99190795">28</text:a></text:p>
          <text:p text:style-name="P28">Struttura di un programma assembly<text:tab/><text:a xlink:type="simple" xlink:href="#__RefHeading___Toc99190796">29</text:a></text:p>
        </text:index-body>
      </text:table-of-content>
      <text:p text:style-name="Standard"/>
      <text:h text:style-name="P30" text:outline-level="2"><text:bookmark-start text:name="__RefHeading___Toc99190750"/>Premessa<text:bookmark-end text:name="__RefHeading___Toc99190750"/></text:h>
      <text:p text:style-name="Corpo_20_del_20_testo_20_no_20_Rientro">EasyCPU è <text:span text:style-name="T17">un </text:span>simulatore <text:s/>che consente di scrivere programmi in linguaggio assembly e di testarne il funzionamento all’interno di un ambiente di programmazione <text:span text:style-name="T17">dotato</text:span> di interfaccia grafica.</text:p>
      <text:p text:style-name="Text_20_body">EasyCPU simula <text:span text:style-name="T17">i </text:span>microprocessori X86, <text:span text:style-name="T17">ma </text:span>implementa un set di istruzioni <text:span text:style-name="T17">e </text:span>una gestione della memoria estremamente semplificati rispetto a quelli supportati dai microprocessore reali. <text:span text:style-name="T17">I</text:span>l suo scopo è quello di fornire uno strumento facile da apprendere e da utilizzare per l’acquisizione dei principi generali <text:span text:style-name="T17">sul</text:span>la programmazione in linguaggio assembly.</text:p>
      <text:h text:style-name="Heading_20_2" text:outline-level="2"><text:bookmark-start text:name="__RefHeading___Toc99190751"/>Struttura della CPU <text:bookmark-end text:name="__RefHeading___Toc99190751"/></text:h>
      <text:h text:style-name="Heading_20_3" text:outline-level="3"><text:bookmark-start text:name="__RefHeading___Toc99190752"/>Artimetica<text:bookmark-end text:name="__RefHeading___Toc99190752"/></text:h>
      <text:p text:style-name="Corpo_20_del_20_testo_20_no_20_Rientro">EasyCPU supporta <text:span text:style-name="T17">soltanto </text:span>l<text:span text:style-name="T17">'</text:span>aritmetica a 16 bit. Ogni valore, sia esso immediato (costante) che memorizzato in un registro o in memoria, è rappresentato mediante il tipo intero a 16 bit, con un intervallo di variazione da –32768 e + 32767.</text:p>
      <text:h text:style-name="Heading_20_3" text:outline-level="3"><text:bookmark-start text:name="__RefHeading___Toc99190753"/>Memoria dati<text:bookmark-end text:name="__RefHeading___Toc99190753"/></text:h>
      <text:p text:style-name="Corpo_20_del_20_testo_20_no_20_Rientro">EasyCPU supporta una memoria non segmentata di 256 elementi interi. Di questi, gli ultimi 16 sono riservati allo «stack»:</text:p>
      <text:p text:style-name="P17"><draw:frame draw:style-name="fr1" draw:name="Immagine2" text:anchor-type="as-char" svg:width="7.613cm" svg:height="6.645cm" draw:z-index="0"><draw:image xlink:href="Pictures/2000007B00001DBE000019F668D86599.wmf" xlink:type="simple" xlink:show="embed" xlink:actuate="onLoad"/></draw:frame></text:p>
      <text:p text:style-name="Corpo_20_del_20_testo_20_no_20_Rientro">Diversamente da quanto accade in un sistema reale, nella memoria vengono memorizzati soltanto i dati. Le istruzioni sono collocate in un vettore a se stante, del quale il registro IP funge da indice.</text:p>
      <text:h text:style-name="Heading_20_3" text:outline-level="3"><text:bookmark-start text:name="__RefHeading___Toc99190754"/>Registri<text:bookmark-end text:name="__RefHeading___Toc99190754"/></text:h>
      <text:p text:style-name="Corpo_20_del_20_testo_20_no_20_Rientro">EasyCPU supporta un set di registri analogo a quello delle microprocessori X86, <text:span text:style-name="T17">ma limitato ad <text:s/>un</text:span>’aritmetica a 16 bit:</text:p>
      <text:p text:style-name="Text_20_body"/>
      <text:p text:style-name="P17"><draw:frame draw:style-name="fr1" draw:name="Immagine3" text:anchor-type="as-char" svg:width="16.993cm" svg:height="5.59cm" draw:z-index="1"><draw:image xlink:href="Pictures/20000126000042DA000015FF8B9D0B8D.wmf" xlink:type="simple" xlink:show="embed" xlink:actuate="onLoad"/></draw:frame></text:p>
      <text:p text:style-name="Text_20_body"/>
      <text:h text:style-name="Heading_20_3" text:outline-level="3"><text:bookmark-start text:name="__RefHeading___Toc99190755"/><text:soft-page-break/>Modelli di indirizzamento<text:bookmark-end text:name="__RefHeading___Toc99190755"/></text:h>
      <text:p text:style-name="Corpo_20_del_20_testo_20_no_20_Rientro">EasyCPU supporta 5 modelli di indirizzamento: immediato, a registro, diretto, indiretto a registro, indiretto a registro con scostamento.</text:p>
      <text:p text:style-name="Corpo_20_come_20_Titolo_20_4">Indirizzamento immediato</text:p>
      <text:p text:style-name="Corpo_20_del_20_testo_20_no_20_Rientro">E’ rappresentato da un valore costante, espresso in forma decimale, esadedimale o carattere. Ad esempio, nelle istruzioni:</text:p>
      <text:p text:style-name="Codice_20_C_23__20_iniziale">mov ax, <text:span text:style-name="T3">1</text:span><text:tab/><text:tab/><text:tab/>// memorizza 1 nel registro AX</text:p>
      <text:p text:style-name="Codice_20_C_23_">mov ax, <text:span text:style-name="T3">0Ah</text:span><text:tab/><text:tab/>// memorizza 10 nel registro BX</text:p>
      <text:p text:style-name="Codice_20_C_23_">mov ax, <text:span text:style-name="T4">'A'</text:span><text:tab/><text:tab/>// memorizza 65 nel registro AX</text:p>
      <text:p text:style-name="P4">i valori <text:span text:style-name="Curier_20_New_20_10">1</text:span>, <text:span text:style-name="Curier_20_New_20_10">0Ah</text:span>, ’<text:span text:style-name="Curier_20_New_20_10">A</text:span>’ rappresentano delle costanti espresse in forma decimale, esadecimale e carattere.</text:p>
      <text:p text:style-name="P4">La forma esadecimale richiede come <text:span text:style-name="T17">postfisso</text:span> la lettera “h”; il primo carattere dev’essere una cifra. Un valore espresso in formato decimale può variare da –32768 a +32767, mentre un valore espresso in formato esadecimale non può essere preceduto dal segno meno e può variare da 0 a FFFF (che equivale a 65535). Una costante in formato carattere è rappresentata mediante un solo carattere delimitato da apici singoli, ed equivale al corrispondente valore ASCII.</text:p>
      <text:p text:style-name="Text_20_body">Nel caso in cui un’istruzione richieda due operandi, soltanto il secondo può essere un valore immediato. </text:p>
      <text:p text:style-name="Corpo_20_come_20_Titolo_20_4">Indirizzamento a registro</text:p>
      <text:p text:style-name="Corpo_20_del_20_testo_20_no_20_Rientro"><text:span text:style-name="T17">L</text:span>’operando è rappresentato da un registro. Un registro può comparire sia come primo che come secondo operando, oppure in entrambi: </text:p>
      <text:p text:style-name="Codice_20_C_23__20_iniziale">mov <text:span text:style-name="T3">ax</text:span>, 1<text:tab/><text:tab/><text:tab/>// memorizza 1 nel registro AX</text:p>
      <text:p text:style-name="Codice_20_C_23_">add <text:span text:style-name="T3">bx</text:span>, <text:span text:style-name="T3">ax</text:span><text:tab/><text:tab/><text:tab/>// somma il contenuto di AX a BX e mette il risultato in BX</text:p>
      <text:p text:style-name="Corpo_20_del_20_testo_20_no_20_Rientro">Il registro <text:span text:style-name="Curier_20_New_20_10">IP</text:span> non può apparire come operando. </text:p>
      <text:p text:style-name="Corpo_20_come_20_Titolo_20_4">Indirizzamento diretto</text:p>
      <text:p text:style-name="Corpo_20_del_20_testo_20_no_20_Rientro"><text:span text:style-name="T17">L</text:span>’operando è rappresentato dall’indirizzo di una locazione di memoria, che può variare dal 0 a 255. Un riferimento a un indirizzo della memoria dati è caratterizzato dalla sintassi “<text:span text:style-name="Curier_20_New_20_10">[indirizzo]</text:span>”. Ad esempio: </text:p>
      <text:p text:style-name="Codice_20_C_23__20_iniziale">mov ax, <text:span text:style-name="T3">[1]</text:span><text:tab/><text:tab/>// memorizza in AX il contenuto della cella di memoria 1</text:p>
      <text:p text:style-name="Codice_20_C_23_">mov bx, <text:span text:style-name="T3">[0Ah]</text:span><text:tab/><text:tab/>// memorizza in BX il contenuto della cella di memoria 10</text:p>
      <text:p text:style-name="Corpo_20_del_20_testo_20_no_20_Rientro">Come si vede, l’indirizzo di memoria può essere espresso sia in forma decimale che esadecimale.</text:p>
      <text:p text:style-name="Riquadro_20_grigio">In realtà un indirizzo di memoria può essere espresso anche mediante una costante di tipo carattere.</text:p>
      <text:p text:style-name="P18"/>
      <text:p text:style-name="Text_20_body"/>
      <text:p text:style-name="Corpo_20_come_20_Titolo_20_4"><text:soft-page-break/>Indirizzamento indiretto a registro semplice</text:p>
      <text:p text:style-name="Corpo_20_del_20_testo_20_no_20_Rientro"><text:span text:style-name="T18">L</text:span>’operando è ancora una volta rappresentato da una locazione della memoria, il cui indirizzo è designato dal contenuto di un registro. A questo scopo possono essere usati i registri <text:span text:style-name="Curier_20_New_20_10">SI</text:span>, <text:span text:style-name="Curier_20_New_20_10">DI</text:span>, <text:span text:style-name="Curier_20_New_20_10">BX</text:span>, <text:span text:style-name="Curier_20_New_20_10">BP</text:span>:</text:p>
      <text:p text:style-name="Codice_20_C_23__20_iniziale">mov ax, <text:span text:style-name="T3">[si]</text:span><text:tab/>// memorizza in AX il contenuto della cella di memoria il</text:p>
      <text:p text:style-name="Codice_20_C_23_"><text:tab/><text:tab/><text:tab/><text:tab/>// cui indirizzo è memorizzato in SI</text:p>
      <text:p text:style-name="Codice_20_C_23__20_iniziale">mov <text:span text:style-name="T3">[di]</text:span>, ax<text:tab/>// memorizza il contenuto di AX nella cella di memoria il</text:p>
      <text:p text:style-name="Codice_20_C_23_"><text:tab/><text:tab/><text:tab/><text:tab/>// cui indirizzo è memorizzato in DI</text:p>
      <text:p text:style-name="Codice_20_C_23__20_iniziale">add cx, <text:span text:style-name="T3">[bp]</text:span><text:tab/>// somma CX al contenuto della cella di memoria il</text:p>
      <text:p text:style-name="Codice_20_C_23_"><text:tab/><text:tab/><text:tab/><text:tab/>// cui indirizzo è memorizzato in BP e mette il risultato in CX</text:p>
      <text:p text:style-name="Corpo_20_come_20_Titolo_20_4">Indirizzamento indiretto a registro con scostamento</text:p>
      <text:p text:style-name="Corpo_20_del_20_testo_20_no_20_Rientro"><text:span text:style-name="T18">A</text:span>l registro usato come indice viene sommata o sottratta una costante per ottenere uno scostamento dalla cella indirizzata:</text:p>
      <text:p text:style-name="Codice_20_C_23__20_iniziale">mov ax, <text:span text:style-name="T3">[bp+2]</text:span><text:tab/><text:tab/><text:tab/>// memorizza in AX il contenuto della cella di memoria </text:p>
      <text:p text:style-name="Codice_20_C_23_"><text:tab/><text:tab/><text:tab/><text:tab/><text:tab/><text:tab/>// che si trova all’indirizzo memorizzato in BP più 2</text:p>
      <text:p text:style-name="Codice_20_C_23__20_iniziale">mov <text:span text:style-name="T3">[di-02h]</text:span>, ax<text:tab/><text:tab/>// memorizza AX nella cella di memoria <text:s/>che si trova </text:p>
      <text:p text:style-name="Codice_20_C_23_"><text:tab/><text:tab/><text:tab/><text:tab/><text:tab/><text:tab/>// all’indirizzo memorizzato in DI meno 2</text:p>
      <text:p text:style-name="Corpo_20_del_20_testo_20_no_20_Rientro">La costante può essere espressa in forma decimale, esadecimale o carattere. </text:p>
      <text:h text:style-name="Heading_20_3" text:outline-level="3"><text:bookmark-start text:name="__RefHeading___Toc99190756"/>Gestione dello stack<text:bookmark-end text:name="__RefHeading___Toc99190756"/></text:h>
      <text:p text:style-name="Corpo_20_del_20_testo_20_no_20_Rientro">In EasyCPU lo stack viene gestito in modo analogo a quanto avviene nei microprocessori X86, ma in forma semplificata. La parte di memoria riservata allo stack inizia a un indirizzo di base immutabile, che è 240; essa occupa esattamente 16 byte.</text:p>
      <text:p text:style-name="Text_20_body">Nella fase di inizializzazione della CPU, il registro SP (puntatore allo stack) viene impostato al valore 256 (indirizzo massimo dello stack più 1).</text:p>
      <text:p text:style-name="P17"><draw:frame draw:style-name="fr1" draw:name="Immagine4" text:anchor-type="as-char" svg:width="9.479cm" svg:height="6.13cm" draw:z-index="2"><draw:image xlink:href="Pictures/2000003400002509000017F39BDA7D3B.wmf" xlink:type="simple" xlink:show="embed" xlink:actuate="onLoad"/></draw:frame></text:p>
      <text:p text:style-name="Corpo_20_del_20_testo_20_no_20_Rientro"/>
      <text:p text:style-name="Corpo_20_del_20_testo_20_no_20_Rientro"/>
      <text:p text:style-name="Corpo_20_del_20_testo_20_no_20_Rientro"><text:soft-page-break/>Lo stack è una struttura dati di tipo FIFO (<text:span text:style-name="T11">First In, First Out</text:span>: il primo che è entra è il primo ad uscire), che viene gestita mediante le istruzioni PUSH e POP. Mediante l’istruzione PUSH viene immesso un valore dallo stack; tale operazione determina un decremento del registro SP. Mediante l’istruzione POP l’ultimo valore allocato viene estratto; essa determina un incremento del registro SP.</text:p>
      <text:p text:style-name="Text_20_body">Il tentativo di allocare un numero di valori superiori alla dimensione dello stack produce un errore di <text:span text:style-name="T4">stack overflow</text:span>.</text:p>
      <text:h text:style-name="Heading_20_3" text:outline-level="3"><text:bookmark-start text:name="__RefHeading___Toc99190757"/>Flag<text:span text:style-name="T24">s</text:span><text:bookmark-end text:name="__RefHeading___Toc99190757"/></text:h>
      <text:p text:style-name="Corpo_20_del_20_testo_20_no_20_Rientro">EasyCPU supporta i flag di segno (SF), zero (ZF) e overflow (OF), i quali vengono prevalentemente impiegati per l’esecuzione dei salti condizionati e sono influenzati dalle operazioni aritmetico-logiche (esclusa DIV).</text:p>
      <text:p text:style-name="Corpo_20_del_20_testo_20_no_20_Rientro">Il flag SF è settato se il risultato di un’operazione aritmetico-logica produce un risultato negativo, e dunque riflette il valore del bit di ordine superiore del risultato. </text:p>
      <text:p text:style-name="Corpo_20_del_20_testo_20_no_20_Rientro">Il flag ZF è settato se il risultato di un’operazione aritmetico-logica è zero.</text:p>
      <text:p text:style-name="Corpo_20_del_20_testo_20_no_20_Rientro">Il flag OF è settato se il risultato di un’operazione aritmetico-logica eccede la capacità di memorizzazione dell’operando e dunque l’intervallo di memorizzazione da –3276<text:span text:style-name="T18">8</text:span> a <text:span text:style-name="T18">+</text:span>3276<text:span text:style-name="T18">7</text:span>.</text:p>
      <text:p text:style-name="Corpo_20_del_20_testo_20_no_20_Rientro">Un <text:span text:style-name="T18">tipico </text:span>test sui flag prevede un confronto tra due operandi <text:span text:style-name="T18">con </text:span>l’istruzione CMP, la quale sottrae il secondo operando dal primo senza però memorizzare il risultato, ma influenzando egualmente lo stato dei flag. </text:p>
      <text:p text:style-name="Text_20_body"/>
      <text:p text:style-name="Corpo_20_del_20_testo_20_no_20_Rientro"/>
      <text:h text:style-name="Heading_20_2" text:outline-level="2"><text:bookmark-start text:name="__RefHeading___Toc99190758"/>Set di istruzioni <text:bookmark-end text:name="__RefHeading___Toc99190758"/></text:h>
      <text:h text:style-name="Heading_20_3" text:outline-level="3"><text:bookmark-start text:name="__RefHeading___Toc99190759"/>Descrizione generale delle istruzioni<text:bookmark-end text:name="__RefHeading___Toc99190759"/></text:h>
      <text:p text:style-name="Corpo_20_del_20_testo_20_no_20_Rientro">EasyCPU supporta istruzioni con zero, uno e due operandi; ogni istruzione ha un numero di operandi predefinito e immutabile. Le istruzioni rispecchiano la seguente sintassi:</text:p>
      <text:p text:style-name="Sintassi_20_codice">&lt;<text:span text:style-name="T11">codice mnemonico</text:span>&gt; &lt;<text:span text:style-name="T11">operando1</text:span>&gt;<text:span text:style-name="T12">opz</text:span>, &lt;<text:span text:style-name="T11">operando2</text:span>&gt;<text:span text:style-name="T12">opz</text:span></text:p>
      <text:p text:style-name="Corpo_20_del_20_testo_20_no_20_Rientro"><text:span text:style-name="T18">G</text:span>li operandi possono assumere il ruolo di «sorgente» e/o di «destinazione». Nel primo caso, l’operando partecipa all’operazione ma non viene modificato da essa. Nel secondo caso, l’operando viene modificato dall’istruzione. </text:p>
      <text:p text:style-name="Text_20_body">In alcuni casi l’operando «sorgente» o quello «destinazione» sono impliciti, cioè non compaiono nel testo dell’istruzione.</text:p>
      <text:h text:style-name="Heading_20_3" text:outline-level="3"><text:bookmark-start text:name="__RefHeading___Toc99190760"/>Modalità di descrizione delle istruzioni<text:bookmark-end text:name="__RefHeading___Toc99190760"/></text:h>
      <text:p text:style-name="Corpo_20_del_20_testo_20_no_20_Rientro">Di seguito, per ogni istruzione saranno presentati:</text:p>
      <text:list xml:id="list7618985072526809891" text:style-name="WW8Num12">
        <text:list-item>
          <text:p text:style-name="Elenco_20_Quadrato">il codice mnemonico;</text:p>
        </text:list-item>
        <text:list-item>
          <text:p text:style-name="Elenco_20_Quadrato">la sintassi;</text:p>
        </text:list-item>
        <text:list-item>
          <text:p text:style-name="Elenco_20_Quadrato">una breve spiegazione sul suo funzionamento, seguita da uno o più esempi d’uso.</text:p>
        </text:list-item>
        <text:list-item>
          <text:p text:style-name="Elenco_20_Quadrato">i flag influenzati.</text:p>
        </text:list-item>
      </text:list>
      <text:p text:style-name="Corpo_20_come_20_Titolo_20_4">Nota sui flag definiti dalle istruzioni</text:p>
      <text:p text:style-name="Corpo_20_del_20_testo_20_no_20_Rientro">Nei microprocessori X86, alcune istruzioni pur non settando direttamente i flag li lasciano in uno stato indefinito. In relazione a un determinato flag, ogni istruzione può dunque produrre tre situazioni:</text:p>
      <text:list xml:id="list223749673157511" text:continue-numbering="true" text:style-name="WW8Num12">
        <text:list-item>
          <text:p text:style-name="Elenco_20_Quadrato">il flag viene lasciato inalterato;</text:p>
        </text:list-item>
        <text:list-item>
          <text:p text:style-name="Elenco_20_Quadrato">in flag viene settato o resettato</text:p>
        </text:list-item>
        <text:list-item>
          <text:p text:style-name="Elenco_20_Quadrato">il flag resta in uno stato indefinito (può assumere casualmente 0 o 1);</text:p>
        </text:list-item>
      </text:list>
      <text:p text:style-name="Corpo_20_del_20_testo_20_no_20_Rientro">EasyCPU si comporta in modo diverso. Un flag può essere impostato oppure lasciato inalterato; in sostanza non esiste lo stato indefinito.</text:p>
      <text:h text:style-name="P31" text:outline-level="3"><text:bookmark-start text:name="__RefHeading___Toc99190761"/><text:span text:style-name="T13">ADD</text:span><text:span text:style-name="T14"> <text:s text:c="2"/>– <text:s text:c="2"/>Addizione</text:span><text:bookmark-end text:name="__RefHeading___Toc99190761"/></text:h>
      <text:p text:style-name="Corpo_20_del_20_testo_20_no_20_Rientro">Sintassi:</text:p>
      <text:p text:style-name="P21"><text:span text:style-name="T15">ADD </text:span><text:span text:style-name="T16">destinazione</text:span><text:span text:style-name="T15">, </text:span><text:span text:style-name="T16">sorgente</text:span></text:p>
      <text:p text:style-name="Corpo_20_del_20_testo_20_no_20_Rientro">Operazione svolta:</text:p>
      <text:p text:style-name="P22">destinazione = destinazione + sorgente</text:p>
      <text:p text:style-name="Corpo_20_del_20_testo_20_no_20_Rientro">Flag definiti:</text:p>
      <text:p text:style-name="P21"><text:span text:style-name="T9">SF</text:span><text:span text:style-name="T10">, </text:span><text:span text:style-name="T9">ZF, OF</text:span></text:p>
      <text:p text:style-name="Corpo_20_del_20_testo_20_no_20_Rientro">Descrizione:</text:p>
      <text:p text:style-name="Corpo_20_del_20_testo_20_no_20_Rientro"><text:span text:style-name="T5">D</text:span><text:span text:style-name="T4">estinazione</text:span> viene sommato <text:span text:style-name="T19">a </text:span><text:span text:style-name="T4">sorgente</text:span>; il risultato viene memorizzato <text:span text:style-name="T19">in </text:span><text:span text:style-name="T4">destinazione</text:span>. </text:p>
      <text:p text:style-name="Corpo_20_del_20_testo_20_no_20_Rientro">Esempi:</text:p>
      <text:p text:style-name="Codice_20_C_23__20_iniziale">add ax, bx<text:tab/><text:tab/>// equivale a: ax = ax + bx</text:p>
      <text:p text:style-name="Codice_20_C_23_">add [10], 2<text:tab/>// equivale a: [10] = [10] + 2</text:p>
      <text:h text:style-name="P33" text:outline-level="3"><text:bookmark-start text:name="__RefHeading___Toc99190762"/><text:span text:style-name="T13">AND</text:span><text:span text:style-name="T14"> <text:s text:c="2"/>– <text:s text:c="2"/>Moltiplicazione logica </text:span><text:bookmark-end text:name="__RefHeading___Toc99190762"/></text:h>
      <text:p text:style-name="Corpo_20_del_20_testo_20_no_20_Rientro">Sintassi:</text:p>
      <text:p text:style-name="P21"><text:span text:style-name="T15">AND </text:span><text:span text:style-name="T16">destinazione</text:span><text:span text:style-name="T15">, </text:span><text:span text:style-name="T16">sorgente</text:span></text:p>
      <text:p text:style-name="Corpo_20_del_20_testo_20_no_20_Rientro">Operazione svolta:</text:p>
      <text:p text:style-name="P22">destinazione = destinazione &amp; sorgente</text:p>
      <text:p text:style-name="Corpo_20_del_20_testo_20_no_20_Rientro">Flag definiti:</text:p>
      <text:p text:style-name="P21"><text:span text:style-name="T9">SF</text:span><text:span text:style-name="T10">, </text:span><text:span text:style-name="T9">ZF; OF = 0</text:span></text:p>
      <text:p text:style-name="Corpo_20_del_20_testo_20_no_20_Rientro">Descrizione:</text:p>
      <text:p text:style-name="Corpo_20_del_20_testo_20_no_20_Rientro"><text:span text:style-name="T20">I</text:span>mposta a 1 i bit del risultato se entrambi i bit corrispondenti dei due operandi sono 1; altrimenti li imposta a 0. Il risultato è memorizzato <text:span text:style-name="T20">in </text:span><text:span text:style-name="T4">destinazione</text:span>.</text:p>
      <text:p text:style-name="Corpo_20_del_20_testo_20_no_20_Rientro">Esempio:</text:p>
      <text:p text:style-name="Codice_20_C_23__20_iniziale">mov ax, 2</text:p>
      <text:p text:style-name="Codice_20_C_23_">and ax, 4<text:tab/><text:tab/>// produce come risultato: 0</text:p>
      <text:h text:style-name="P31" text:outline-level="3"><text:bookmark-start text:name="__RefHeading___Toc99190763"/><text:span text:style-name="T13">CALL</text:span><text:span text:style-name="T14"> <text:s text:c="2"/>– <text:s text:c="2"/>Chiamata di una procedura</text:span><text:bookmark-end text:name="__RefHeading___Toc99190763"/></text:h>
      <text:p text:style-name="Corpo_20_del_20_testo_20_no_20_Rientro">Sintassi:</text:p>
      <text:p text:style-name="P21"><text:span text:style-name="T15">CALL </text:span><text:span text:style-name="T16">etichetta</text:span></text:p>
      <text:p text:style-name="Corpo_20_del_20_testo_20_no_20_Rientro">Operazione svolta:</text:p>
      <text:p text:style-name="P22">SP = SP – 1</text:p>
      <text:p text:style-name="P25">MEMORIA[SP] = IP</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M</text:span>odifica il flusso di esecuzione delle istruzioni, assegnando al registro IP un nuovo indirizzo nella memoria delle istruzioni, dopo averlo precedentemente salvato sullo stack. Mediante l’istruzione RET è possibile recuperare il valore di IP per riprendere l’esecuzione dell’istruzione successiva a CALL. </text:p>
      <text:p text:style-name="Corpo_20_del_20_testo_20_no_20_Rientro">Esempio:</text:p>
      <text:p text:style-name="Codice_20_C_23__20_iniziale">call ciclo<text:tab/><text:tab/>// IP viene punta alla istruzione designata da "ciclo"</text:p>
      <text:p text:style-name="Codice_20_C_23_">...</text:p>
      <text:p text:style-name="Codice_20_C_23_">ciclo: <text:span text:style-name="T11">&lt;inizio della procedura&gt;</text:span></text:p>
      <text:h text:style-name="P35" text:outline-level="3"><text:bookmark-start text:name="__RefHeading___Toc99190764"/><text:span text:style-name="T13">CMP</text:span><text:span text:style-name="T14"> <text:s text:c="2"/>– <text:s text:c="2"/>Confronto</text:span><text:bookmark-end text:name="__RefHeading___Toc99190764"/></text:h>
      <text:p text:style-name="Corpo_20_del_20_testo_20_no_20_Rientro">Sintassi:</text:p>
      <text:p text:style-name="P21"><text:span text:style-name="T15">CMP </text:span><text:span text:style-name="T16">sorgente1, sorgente2</text:span></text:p>
      <text:p text:style-name="Corpo_20_del_20_testo_20_no_20_Rientro">Operazione svolta:</text:p>
      <text:p text:style-name="P23">sorgente1 – sorgente2</text:p>
      <text:p text:style-name="P3">Flag definiti: </text:p>
      <text:p text:style-name="P22">ZF, SF,OF</text:p>
      <text:p text:style-name="Corpo_20_del_20_testo_20_no_20_Rientro">Descrizione:</text:p>
      <text:p text:style-name="Corpo_20_del_20_testo_20_no_20_Rientro"><text:span text:style-name="T20">S</text:span>ottrae <text:span text:style-name="T6">sortgente2</text:span><text:span text:style-name="T20"> a </text:span><text:span text:style-name="T6">sorgente1</text:span><text:span text:style-name="T20"> </text:span>senza memorizzare il risultato. L’effetto è quello di aggiornare i valori dei flag, <text:span text:style-name="T20">i quali </text:span>potranno essere testati mediante un’istruzione di salto condizionato.</text:p>
      <text:p text:style-name="Corpo_20_del_20_testo_20_no_20_Rientro">Esempio:</text:p>
      <text:p text:style-name="Codice_20_C_23__20_iniziale">cmp ax, bx<text:tab/><text:tab/>// confronta ax con bx</text:p>
      <text:p text:style-name="Codice_20_C_23_">je salto<text:tab/><text:tab/>// salta se ax è uguale a bx (e dunque il flag zero è 1)</text:p>
      <text:h text:style-name="P33" text:outline-level="3"><text:bookmark-start text:name="__RefHeading___Toc99190765"/><text:soft-page-break/><text:span text:style-name="T13">DEC <text:s text:c="2"/></text:span><text:span text:style-name="T14">– <text:s text:c="2"/>Decremento</text:span><text:bookmark-end text:name="__RefHeading___Toc99190765"/></text:h>
      <text:p text:style-name="Corpo_20_del_20_testo_20_no_20_Rientro">Sintassi:</text:p>
      <text:p text:style-name="P21"><text:span text:style-name="T15">DEC </text:span><text:span text:style-name="T16">destinazione</text:span></text:p>
      <text:p text:style-name="Corpo_20_del_20_testo_20_no_20_Rientro">Operazione svolta:</text:p>
      <text:p text:style-name="P22">destinazione = destinazione – 1</text:p>
      <text:p text:style-name="Corpo_20_del_20_testo_20_no_20_Rientro">Flag definiti:</text:p>
      <text:p text:style-name="P22">ZF, SF, OF</text:p>
      <text:p text:style-name="Corpo_20_del_20_testo_20_no_20_Rientro">Descrizione:</text:p>
      <text:p text:style-name="Corpo_20_del_20_testo_20_no_20_Rientro"><text:span text:style-name="T20">D</text:span>ecrementa di uno <text:span text:style-name="T6">destinazione</text:span><text:span text:style-name="T20">.</text:span></text:p>
      <text:p text:style-name="Corpo_20_del_20_testo_20_no_20_Rientro">Esempi:</text:p>
      <text:p text:style-name="Codice_20_C_23__20_iniziale">dec ax<text:tab/><text:tab/>// decrementa di 1 ax</text:p>
      <text:p text:style-name="Codice_20_C_23_">dec [20]<text:tab/>// decrementa di 1 il contenuto della locazione [20]</text:p>
      <text:p text:style-name="Codice_20_C_23_">dec [si]<text:tab/>// decrementa di 1 il contenuto della locazione puntata da si</text:p>
      <text:h text:style-name="P33" text:outline-level="3"><text:bookmark-start text:name="__RefHeading___Toc99190766"/><text:span text:style-name="T13">DIV <text:s/></text:span><text:span text:style-name="T14">– <text:s text:c="2"/>Divisione intera</text:span><text:bookmark-end text:name="__RefHeading___Toc99190766"/></text:h>
      <text:p text:style-name="Corpo_20_del_20_testo_20_no_20_Rientro">Sintassi:</text:p>
      <text:p text:style-name="P21"><text:span text:style-name="T15">DIV </text:span><text:span text:style-name="T16">sorgente</text:span></text:p>
      <text:p text:style-name="Corpo_20_del_20_testo_20_no_20_Rientro">Operazione svolta:</text:p>
      <text:p text:style-name="P23">AX = DX:AX / sorgente</text:p>
      <text:p text:style-name="P23">DX = DX:AX % sorgente</text:p>
      <text:p text:style-name="P3">Flag definiti:</text:p>
      <text:p text:style-name="P22">Nessuno</text:p>
      <text:p text:style-name="Corpo_20_del_20_testo_20_no_20_Rientro">Descrizione:</text:p>
      <text:p text:style-name="Corpo_20_del_20_testo_20_no_20_Rientro"><text:span text:style-name="T20">D</text:span>ivide il valore memorizzato nella coppia di registri DX:AX per <text:span text:style-name="T6">sorgente</text:span>, memorizzando in AX il quoziente intero della divisione e in DX il resto intero. </text:p>
      <text:p text:style-name="Corpo_20_del_20_testo_20_no_20_Rientro">Esempi:</text:p>
      <text:p text:style-name="Codice_20_C_23__20_iniziale">div 2<text:tab/><text:tab/>// divide dx:ax per 2</text:p>
      <text:p text:style-name="Codice_20_C_23_">div [20]<text:tab/>// divide dx:ax per il contenuto della locazione [20]</text:p>
      <text:p text:style-name="Codice_20_C_23_">div [si] <text:tab/>// divide dx:ax per il contenuto della locazione puntata da si</text:p>
      <text:h text:style-name="P31" text:outline-level="3"><text:bookmark-start text:name="__RefHeading___Toc99190767"/><text:span text:style-name="T13">INC <text:s/></text:span><text:span text:style-name="T14">– <text:s text:c="2"/>Incremento</text:span><text:bookmark-end text:name="__RefHeading___Toc99190767"/></text:h>
      <text:p text:style-name="Corpo_20_del_20_testo_20_no_20_Rientro">Sintassi:</text:p>
      <text:p text:style-name="P21"><text:span text:style-name="T15">INC </text:span><text:span text:style-name="T16">destinazione</text:span></text:p>
      <text:p text:style-name="Corpo_20_del_20_testo_20_no_20_Rientro">Operazione svolta:</text:p>
      <text:p text:style-name="P22">destinazione = destinazione + 1</text:p>
      <text:p text:style-name="Corpo_20_del_20_testo_20_no_20_Rientro">Flag definiti:</text:p>
      <text:p text:style-name="P22">ZF, SF, OF</text:p>
      <text:p text:style-name="Corpo_20_del_20_testo_20_no_20_Rientro">Descrizione:</text:p>
      <text:p text:style-name="P5"><text:span text:style-name="T20">I</text:span>ncrementa di uno <text:span text:style-name="T6">destinazione</text:span><text:span text:style-name="T20">.</text:span> </text:p>
      <text:p text:style-name="P5">Esempi:</text:p>
      <text:p text:style-name="Codice_20_C_23__20_iniziale">inc ax<text:tab/><text:tab/>// incrementa di 1 ax</text:p>
      <text:p text:style-name="Codice_20_C_23_">inc [20]<text:tab/>// incrementa di 1 il contenuto della locazione [20]</text:p>
      <text:p text:style-name="Codice_20_C_23_">inc [si]<text:tab/>// incrementa di 1 il contenuto della locazione puntata da si</text:p>
      <text:h text:style-name="P33" text:outline-level="3"><text:bookmark-start text:name="__RefHeading___Toc99190768"/><text:span text:style-name="T13">JCXZ <text:s text:c="2"/></text:span><text:span text:style-name="T14">– <text:s text:c="2"/>Salto se CX è zero</text:span><text:bookmark-end text:name="__RefHeading___Toc99190768"/></text:h>
      <text:p text:style-name="Corpo_20_del_20_testo_20_no_20_Rientro">Sintassi:</text:p>
      <text:p text:style-name="P21"><text:span text:style-name="T15">JCXZ </text:span><text:span text:style-name="T16">etichetta</text:span></text:p>
      <text:p text:style-name="Corpo_20_del_20_testo_20_no_20_Rientro">Operazione svolta:</text:p>
      <text:p text:style-name="P22">se CX == 0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M</text:span>odifica il flusso di esecuzione delle istruzioni, assegnando al registro IP un nuovo indirizzo nella memoria delle istruzioni. </text:p>
      <text:p text:style-name="Corpo_20_del_20_testo_20_no_20_Rientro">Esempi:</text:p>
      <text:p text:style-name="Codice_20_C_23__20_iniziale">jcxz salto<text:tab/><text:tab/>// se "cx = 0" IP punta alla istruzione designata da " salto "</text:p>
      <text:p text:style-name="Codice_20_C_23_">...</text:p>
      <text:p text:style-name="Codice_20_C_23_">salto: …</text:p>
      <text:p text:style-name="Corpo_20_del_20_testo_20_no_20_Rientro"/>
      <text:h text:style-name="P33" text:outline-level="3"><text:bookmark-start text:name="__RefHeading___Toc99190769"/><text:soft-page-break/><text:span text:style-name="T13">JE <text:s text:c="2"/></text:span><text:span text:style-name="T14">– <text:s text:c="2"/>Salto se uguale</text:span><text:bookmark-end text:name="__RefHeading___Toc99190769"/></text:h>
      <text:p text:style-name="Corpo_20_del_20_testo_20_no_20_Rientro">Sintassi:</text:p>
      <text:p text:style-name="P21"><text:span text:style-name="T15">JE </text:span><text:span text:style-name="T16">etichetta</text:span></text:p>
      <text:p text:style-name="Corpo_20_del_20_testo_20_no_20_Rientro">Operazione svolta:</text:p>
      <text:p text:style-name="P22">se ZF == 1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text:span text:style-name="T20">A</text:span>ssegna al registro IP un nuovo indirizzo nella memoria delle istruzioni, ma soltanto se ZF è 1. </text:p>
      <text:p text:style-name="P5">JE è 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e salto<text:tab/><text:tab/>// se "ax = bx" IP punta alla istruzione designata da " salto "</text:p>
      <text:h text:style-name="P33" text:outline-level="3"><text:bookmark-start text:name="__RefHeading___Toc99190770"/><text:span text:style-name="T13">JG <text:s/></text:span><text:span text:style-name="T14">– <text:s text:c="2"/>Salto se maggiore</text:span><text:bookmark-end text:name="__RefHeading___Toc99190770"/></text:h>
      <text:p text:style-name="Corpo_20_del_20_testo_20_no_20_Rientro">Sintassi:</text:p>
      <text:p text:style-name="P21"><text:span text:style-name="T15">JG </text:span><text:span text:style-name="T16">etichetta</text:span></text:p>
      <text:p text:style-name="Corpo_20_del_20_testo_20_no_20_Rientro">Operazione svolta:</text:p>
      <text:p text:style-name="P22">se SF == OF e ZF = 0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text:span text:style-name="T20">A</text:span>ssegna al registro IP un nuovo indirizzo nella memoria delle istruzioni in base al risultato dell’ultima operazione. </text:p>
      <text:p text:style-name="P5"><text:span text:style-name="T20">È </text:span>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g salto<text:tab/><text:tab/>// se "ax &gt; bx" IP punta alla istruzione designata da " salto "</text:p>
      <text:h text:style-name="P32" text:outline-level="3"><text:bookmark-start text:name="__RefHeading___Toc99190771"/><text:soft-page-break/><text:span text:style-name="T13">JGE <text:s/></text:span><text:span text:style-name="T14">– <text:s text:c="2"/>Salto se maggiore o uguale</text:span><text:bookmark-end text:name="__RefHeading___Toc99190771"/></text:h>
      <text:p text:style-name="Corpo_20_del_20_testo_20_no_20_Rientro">Sintassi:</text:p>
      <text:p text:style-name="P21"><text:span text:style-name="T15">JGE </text:span><text:span text:style-name="T16">etichetta</text:span></text:p>
      <text:p text:style-name="Corpo_20_del_20_testo_20_no_20_Rientro">Operazione svolta:</text:p>
      <text:p text:style-name="P22">se SF == OF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text:span text:style-name="T20">A</text:span>ssegna al registro IP un nuovo indirizzo nella memoria delle istruzioni in base al risultato dell’ultima operazione. </text:p>
      <text:p text:style-name="P5"><text:span text:style-name="T20">È </text:span>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g salto<text:tab/><text:tab/>// se "ax &gt; bx" IP punta alla istruzione designata da " salto "</text:p>
      <text:h text:style-name="P33" text:outline-level="3"><text:bookmark-start text:name="__RefHeading___Toc99190772"/><text:span text:style-name="T13">JL <text:s/></text:span><text:span text:style-name="T14">– <text:s text:c="2"/>Salto se minore</text:span><text:bookmark-end text:name="__RefHeading___Toc99190772"/></text:h>
      <text:p text:style-name="Corpo_20_del_20_testo_20_no_20_Rientro">Sintassi:</text:p>
      <text:p text:style-name="P21"><text:span text:style-name="T15">JL </text:span><text:span text:style-name="T16">etichetta</text:span></text:p>
      <text:p text:style-name="Corpo_20_del_20_testo_20_no_20_Rientro">Operazione svolta:</text:p>
      <text:p text:style-name="P22">se SF != OF <text:s/>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text:span text:style-name="T20">A</text:span>ssegna al registro IP un nuovo indirizzo nella memoria delle istruzioni in base al risultato dell’ultima operazione. </text:p>
      <text:p text:style-name="P5"><text:span text:style-name="T20">È </text:span>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l salto<text:tab/><text:tab/>// se "ax &lt; bx" IP punta alla istruzione designata da " salto "</text:p>
      <text:h text:style-name="P33" text:outline-level="3"><text:bookmark-start text:name="__RefHeading___Toc99190773"/><text:soft-page-break/><text:span text:style-name="T13">JLE <text:s/></text:span><text:span text:style-name="T14">– <text:s text:c="2"/>Salto se minore o uguale</text:span><text:bookmark-end text:name="__RefHeading___Toc99190773"/></text:h>
      <text:p text:style-name="Corpo_20_del_20_testo_20_no_20_Rientro">Sintassi:</text:p>
      <text:p text:style-name="P21"><text:span text:style-name="T15">JLE </text:span><text:span text:style-name="T16">etichetta</text:span></text:p>
      <text:p text:style-name="Corpo_20_del_20_testo_20_no_20_Rientro">Operazione svolta:</text:p>
      <text:p text:style-name="P22">se SF != OF o ZF == 1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text:span text:style-name="T20">A</text:span>ssegna al registro IP un nuovo indirizzo nella memoria delle istruzioni in base al risultato dell’ultima operazione. </text:p>
      <text:p text:style-name="P5"><text:span text:style-name="T20">È </text:span>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l salto<text:tab/><text:tab/>// se "ax &lt; bx" IP punta alla istruzione designata da " salto "</text:p>
      <text:h text:style-name="P33" text:outline-level="3"><text:bookmark-start text:name="__RefHeading___Toc99190774"/><text:span text:style-name="T13">JMP <text:s/></text:span><text:span text:style-name="T14">– <text:s text:c="2"/>Salto incondizionato</text:span><text:bookmark-end text:name="__RefHeading___Toc99190774"/></text:h>
      <text:p text:style-name="Corpo_20_del_20_testo_20_no_20_Rientro">Sintassi:</text:p>
      <text:p text:style-name="P21"><text:span text:style-name="T15">JMP </text:span><text:span text:style-name="T16">etichetta</text:span></text:p>
      <text:p text:style-name="Corpo_20_del_20_testo_20_no_20_Rientro">Operazione svolta:</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M</text:span>odifica il flusso di esecuzione delle istruzioni, assegnando al registro IP un nuovo indirizzo nella memoria delle istruzioni. </text:p>
      <text:p text:style-name="Corpo_20_del_20_testo_20_no_20_Rientro">Esempio:</text:p>
      <text:p text:style-name="Codice_20_C_23__20_iniziale">jmp salto<text:tab/><text:tab/>// IP punta alla istruzione designata da " salto "</text:p>
      <text:p text:style-name="Codice_20_C_23_"/>
      <text:p text:style-name="Codice_20_C_23_">salto: ...</text:p>
      <text:p text:style-name="Codice_20_C_23_"/>
      <text:h text:style-name="P33" text:outline-level="3"><text:bookmark-start text:name="__RefHeading___Toc99190775"/><text:soft-page-break/><text:span text:style-name="T13">JNE <text:s/></text:span><text:span text:style-name="T14">– <text:s text:c="2"/>Salto se diverso</text:span><text:bookmark-end text:name="__RefHeading___Toc99190775"/></text:h>
      <text:p text:style-name="Corpo_20_del_20_testo_20_no_20_Rientro">Sintassi:</text:p>
      <text:p text:style-name="P21"><text:span text:style-name="T15">JNE </text:span><text:span text:style-name="T16">etichetta</text:span></text:p>
      <text:p text:style-name="Corpo_20_del_20_testo_20_no_20_Rientro">Operazione svolta:</text:p>
      <text:p text:style-name="P22">se ZF == 0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P5">JNE assegna al registro IP un nuovo indirizzo nella memoria delle istruzioni, ma soltanto se ZF è 0. </text:p>
      <text:p text:style-name="P5"><text:span text:style-name="T20">È </text:span>impiegata dopo un’istruzione CMP <text:span text:style-name="T20">allo scopo di <text:s/>eseguire un salto condizionato.</text:span></text:p>
      <text:p text:style-name="Corpo_20_del_20_testo_20_no_20_Rientro">Esempi:</text:p>
      <text:p text:style-name="Codice_20_C_23__20_iniziale">cmp ax, bx</text:p>
      <text:p text:style-name="Codice_20_C_23_">jne salto<text:tab/><text:tab/>// se "ax != bx" IP punta alla istruzione designata da " salto "</text:p>
      <text:h text:style-name="P34" text:outline-level="3"><text:bookmark-start text:name="__RefHeading___Toc99190776"/><text:span text:style-name="T13">JNO <text:s/></text:span><text:span text:style-name="T14">– <text:s text:c="2"/>Salto se non overflow</text:span><text:bookmark-end text:name="__RefHeading___Toc99190776"/></text:h>
      <text:p text:style-name="Corpo_20_del_20_testo_20_no_20_Rientro">Sintassi:</text:p>
      <text:p text:style-name="P21"><text:span text:style-name="T15">JNO </text:span><text:span text:style-name="T16">etichetta</text:span></text:p>
      <text:p text:style-name="Corpo_20_del_20_testo_20_no_20_Rientro">Operazione svolta:</text:p>
      <text:p text:style-name="P22">se OF == 0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A</text:span>ssegna al registro IP un nuovo indirizzo nella memoria delle istruzioni, ma soltanto se l’ultima operazione <text:span text:style-name="T21">non ha prodotto un overflow</text:span>. </text:p>
      <text:p text:style-name="Corpo_20_del_20_testo_20_no_20_Rientro">Esempi:</text:p>
      <text:p text:style-name="Codice_20_C_23__20_iniziale">add ax, bx</text:p>
      <text:p text:style-name="Codice_20_C_23_">jno salto<text:tab/><text:tab/>// se "non overflow " IP punta alla istruzione designata da "salto"</text:p>
      <text:h text:style-name="P33" text:outline-level="3"><text:bookmark-start text:name="__RefHeading___Toc99190777"/><text:soft-page-break/><text:span text:style-name="T13">JNS <text:s/></text:span><text:span text:style-name="T14">– <text:s text:c="2"/>Salto se il flag di segno è 0</text:span><text:bookmark-end text:name="__RefHeading___Toc99190777"/></text:h>
      <text:p text:style-name="Corpo_20_del_20_testo_20_no_20_Rientro">Sintassi:</text:p>
      <text:p text:style-name="P21"><text:span text:style-name="T15">JNO </text:span><text:span text:style-name="T16">etichetta</text:span></text:p>
      <text:p text:style-name="Corpo_20_del_20_testo_20_no_20_Rientro">Operazione svolta:</text:p>
      <text:p text:style-name="P22">se SF == 0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A</text:span>ssegna al registro IP un nuovo indirizzo nella memoria delle istruzioni, ma soltanto se l’ultima operazione ha dato un risultato <text:span text:style-name="T21">non negativo</text:span>. </text:p>
      <text:p text:style-name="Corpo_20_del_20_testo_20_no_20_Rientro">Esempi:</text:p>
      <text:p text:style-name="Codice_20_C_23__20_iniziale">sub ax, bx</text:p>
      <text:p text:style-name="Codice_20_C_23_">jns salto<text:tab/><text:tab/>// se "ax &gt;= 0" IP punta alla istruzione designata da "salto"</text:p>
      <text:h text:style-name="P33" text:outline-level="3"><text:bookmark-start text:name="__RefHeading___Toc99190778"/><text:span text:style-name="T13">JO <text:s/></text:span><text:span text:style-name="T14">– <text:s text:c="2"/>Salto se overflow</text:span><text:bookmark-end text:name="__RefHeading___Toc99190778"/></text:h>
      <text:p text:style-name="Corpo_20_del_20_testo_20_no_20_Rientro">Sintassi:</text:p>
      <text:p text:style-name="P21"><text:span text:style-name="T15">JNO </text:span><text:span text:style-name="T16">etichetta</text:span></text:p>
      <text:p text:style-name="Corpo_20_del_20_testo_20_no_20_Rientro">Operazione svolta:</text:p>
      <text:p text:style-name="P22">se OF == 1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A</text:span>ssegna al registro IP un nuovo indirizzo nella memoria delle istruzioni, ma soltanto se l’ultima operazione ha prodotto un overflow. </text:p>
      <text:p text:style-name="Corpo_20_del_20_testo_20_no_20_Rientro">Esempi:</text:p>
      <text:p text:style-name="Codice_20_C_23__20_iniziale">add ax, bx</text:p>
      <text:p text:style-name="Codice_20_C_23_">jo salto<text:tab/><text:tab/>// se "overflow " IP punta alla istruzione designata da "salto"</text:p>
      <text:h text:style-name="P33" text:outline-level="3"><text:bookmark-start text:name="__RefHeading___Toc99190779"/><text:soft-page-break/><text:span text:style-name="T13">JS <text:s/></text:span><text:span text:style-name="T14">– <text:s text:c="2"/>Salto se il flag di segno è 1</text:span><text:bookmark-end text:name="__RefHeading___Toc99190779"/></text:h>
      <text:p text:style-name="Corpo_20_del_20_testo_20_no_20_Rientro">Sintassi:</text:p>
      <text:p text:style-name="P21"><text:span text:style-name="T15">JNO </text:span><text:span text:style-name="T16">etichetta</text:span></text:p>
      <text:p text:style-name="Corpo_20_del_20_testo_20_no_20_Rientro">Operazione svolta:</text:p>
      <text:p text:style-name="P22">se SF == 1 esegue:</text:p>
      <text:p text:style-name="P25">IP = indirizzo designato dall’etichetta</text:p>
      <text:p text:style-name="Corpo_20_del_20_testo_20_no_20_Rientro">Flag definiti:</text:p>
      <text:p text:style-name="P22">Nessuno</text:p>
      <text:p text:style-name="Corpo_20_del_20_testo_20_no_20_Rientro">Descrizione:</text:p>
      <text:p text:style-name="Corpo_20_del_20_testo_20_no_20_Rientro"><text:span text:style-name="T20">A</text:span>ssegna al registro IP un nuovo indirizzo nella memoria delle istruzioni, ma soltanto se l’ultima operazione ha dato un risultato negativo. </text:p>
      <text:p text:style-name="Corpo_20_del_20_testo_20_no_20_Rientro">Esempi:</text:p>
      <text:p text:style-name="Codice_20_C_23__20_iniziale">sub ax, bx</text:p>
      <text:p text:style-name="Codice_20_C_23_">js salto<text:tab/><text:tab/>// se "ax &lt; 0" IP punta alla istruzione designata da "salto"</text:p>
      <text:h text:style-name="P33" text:outline-level="3"><text:bookmark-start text:name="__RefHeading___Toc99190780"/><text:span text:style-name="T13">MOV</text:span><text:span text:style-name="T14"> <text:s text:c="2"/>– <text:s text:c="2"/>Trasferimento</text:span><text:bookmark-end text:name="__RefHeading___Toc99190780"/></text:h>
      <text:p text:style-name="Corpo_20_del_20_testo_20_no_20_Rientro">Sintassi:</text:p>
      <text:p text:style-name="P21"><text:span text:style-name="T15">MOV </text:span><text:span text:style-name="T16">destinazione</text:span><text:span text:style-name="T15">, </text:span><text:span text:style-name="T16">sorgente</text:span></text:p>
      <text:p text:style-name="Corpo_20_del_20_testo_20_no_20_Rientro">Operazione svolta:</text:p>
      <text:p text:style-name="P22">destinazione = sorgente</text:p>
      <text:p text:style-name="Corpo_20_del_20_testo_20_no_20_Rientro">Flag definiti:</text:p>
      <text:p text:style-name="P22">Nessuno</text:p>
      <text:p text:style-name="Corpo_20_del_20_testo_20_no_20_Rientro">Descrizione:</text:p>
      <text:p text:style-name="Corpo_20_del_20_testo_20_no_20_Rientro"><text:span text:style-name="T20">C</text:span>opia il contenuto <text:span text:style-name="T20">di </text:span><text:span text:style-name="T6">sorgente</text:span><text:span text:style-name="T20"> in </text:span><text:span text:style-name="T4">destinazione</text:span>.</text:p>
      <text:p text:style-name="Corpo_20_del_20_testo_20_no_20_Rientro">Esempi:</text:p>
      <text:p text:style-name="Codice_20_C_23__20_iniziale">mov ax, bx<text:tab/><text:tab/>// copia in ax il contenuto di bx</text:p>
      <text:p text:style-name="Codice_20_C_23_">mov [10], 2<text:tab/>// copia nella locazione 10 il valore 2</text:p>
      <text:h text:style-name="P31" text:outline-level="3"><text:bookmark-start text:name="__RefHeading___Toc99190781"/><text:span text:style-name="T13">MOVS</text:span><text:span text:style-name="T14"> <text:s/>– <text:s text:c="2"/>Trasferimento di una sequenza </text:span><text:bookmark-end text:name="__RefHeading___Toc99190781"/></text:h>
      <text:p text:style-name="Corpo_20_del_20_testo_20_no_20_Rientro">Sintassi:</text:p>
      <text:p text:style-name="P24">MOVS </text:p>
      <text:p text:style-name="Corpo_20_del_20_testo_20_no_20_Rientro">Operazione svolta:</text:p>
      <text:p text:style-name="P22">MEMORIA[DI] = MEMORIA[SI]</text:p>
      <text:p text:style-name="Corpo_20_del_20_testo_20_no_20_Rientro">Flag definiti:</text:p>
      <text:p text:style-name="P22">Nessuno</text:p>
      <text:p text:style-name="Corpo_20_del_20_testo_20_no_20_Rientro">Descrizione:</text:p>
      <text:p text:style-name="Corpo_20_del_20_testo_20_no_20_Rientro"><text:span text:style-name="T20">C</text:span>opia il contenuto della locazione di memoria puntata da SI nella locazione di memoria puntata da DI.</text:p>
      <text:p text:style-name="Corpo_20_del_20_testo_20_no_20_Rientro">Esempi:</text:p>
      <text:p text:style-name="Codice_20_C_23__20_iniziale">mov di, 0<text:tab/><text:tab/><text:tab/>// imposta a 0 di</text:p>
      <text:p text:style-name="Codice_20_C_23_">mov si, 10<text:tab/><text:tab/><text:tab/>// imposta a 10 si</text:p>
      <text:p text:style-name="Codice_20_C_23_">movs<text:tab/><text:tab/><text:tab/><text:tab/>// equivale a: memoria[0] = memoria[10]</text:p>
      <text:h text:style-name="P33" text:outline-level="3"><text:bookmark-start text:name="__RefHeading___Toc99190782"/><text:span text:style-name="T13">MUL <text:s text:c="2"/></text:span><text:span text:style-name="T14">– <text:s text:c="2"/>Moltiplicazione intera</text:span><text:bookmark-end text:name="__RefHeading___Toc99190782"/></text:h>
      <text:p text:style-name="Corpo_20_del_20_testo_20_no_20_Rientro">Sintassi:</text:p>
      <text:p text:style-name="P21"><text:span text:style-name="T15">MUL </text:span><text:span text:style-name="T16">sorgente</text:span></text:p>
      <text:p text:style-name="Corpo_20_del_20_testo_20_no_20_Rientro">Operazione svolta:</text:p>
      <text:p text:style-name="P23">DX:AX = AX * sorgente</text:p>
      <text:p text:style-name="P3">Flag definiti:</text:p>
      <text:p text:style-name="P22">OF</text:p>
      <text:p text:style-name="Corpo_20_del_20_testo_20_no_20_Rientro">Descrizione:</text:p>
      <text:p text:style-name="Corpo_20_del_20_testo_20_no_20_Rientro"><text:span text:style-name="T20">M</text:span>oltiplica il registro AX per <text:span text:style-name="T6">sorgente</text:span>, memorizzando nella coppia di registri DX:AX il risultato della moltiplicazione. Se il flag OF viene settato significa che DX contiene delle cifre significative.</text:p>
      <text:p text:style-name="Corpo_20_del_20_testo_20_no_20_Rientro">Esempi:</text:p>
      <text:p text:style-name="Codice_20_C_23__20_iniziale">mul 2<text:tab/><text:tab/>// moltiplica ax per 2</text:p>
      <text:p text:style-name="Codice_20_C_23_">mul [20]<text:tab/>// moltiplica ax per il contenuto della locazione [20]</text:p>
      <text:p text:style-name="Codice_20_C_23_">mul [si] <text:tab/>// moltiplica ax per il contenuto della locazione puntata da si</text:p>
      <text:p text:style-name="Codice_20_C_23_"/>
      <text:h text:style-name="P33" text:outline-level="3"><text:bookmark-start text:name="__RefHeading___Toc99190783"/><text:soft-page-break/><text:span text:style-name="T13">NEG <text:s text:c="2"/></text:span><text:span text:style-name="T14">– <text:s text:c="2"/>Negazione (formazione del complemento a 2)</text:span><text:bookmark-end text:name="__RefHeading___Toc99190783"/></text:h>
      <text:p text:style-name="Corpo_20_del_20_testo_20_no_20_Rientro">Sintassi:</text:p>
      <text:p text:style-name="P21"><text:span text:style-name="T15">NEG </text:span><text:span text:style-name="T16">destinazione</text:span></text:p>
      <text:p text:style-name="Corpo_20_del_20_testo_20_no_20_Rientro">Operazione svolta:</text:p>
      <text:p text:style-name="P22">destinazione = 0 - destinazione</text:p>
      <text:p text:style-name="Corpo_20_del_20_testo_20_no_20_Rientro">Flag definiti:</text:p>
      <text:p text:style-name="P22">SF, ZF</text:p>
      <text:p text:style-name="Corpo_20_del_20_testo_20_no_20_Rientro">Descrizione:</text:p>
      <text:p text:style-name="Corpo_20_del_20_testo_20_no_20_Rientro"><text:span text:style-name="T20">S</text:span>ottrae <text:span text:style-name="T6">destinazione</text:span><text:span text:style-name="T20"> </text:span>a 0, ottenendo così il suo complemento a 2.</text:p>
      <text:p text:style-name="Corpo_20_del_20_testo_20_no_20_Rientro">Esempi:</text:p>
      <text:p text:style-name="Codice_20_C_23__20_iniziale">mov ax, 2</text:p>
      <text:p text:style-name="Codice_20_C_23_">neg ax<text:tab/><text:tab/>// equivale a <text:span text:style-name="T4">ax = 0 – ax</text:span>, che produce: -2 (FFFE in esadecim.)</text:p>
      <text:h text:style-name="P33" text:outline-level="3"><text:bookmark-start text:name="__RefHeading___Toc99190784"/><text:span text:style-name="T13">NOP <text:s text:c="2"/></text:span><text:span text:style-name="T14">– <text:s text:c="2"/>Nessuna operazione</text:span><text:bookmark-end text:name="__RefHeading___Toc99190784"/></text:h>
      <text:p text:style-name="Corpo_20_del_20_testo_20_no_20_Rientro">Sintassi:</text:p>
      <text:p text:style-name="P24">NOP</text:p>
      <text:p text:style-name="Corpo_20_del_20_testo_20_no_20_Rientro">Operazione svolta:</text:p>
      <text:p text:style-name="P22">Nessuna</text:p>
      <text:p text:style-name="Corpo_20_del_20_testo_20_no_20_Rientro">Flag definiti:</text:p>
      <text:p text:style-name="P22">Nessuno</text:p>
      <text:p text:style-name="Corpo_20_del_20_testo_20_no_20_Rientro">Descrizione:</text:p>
      <text:p text:style-name="Corpo_20_del_20_testo_20_no_20_Rientro"><text:span text:style-name="T20">N</text:span>on fa compiere alla CPU nessuna azione. Il suo impiego è normalmente quello di garantire la correttezza formale del programma, laddove la modalità di implementazione dell’algoritmo richiede comunque una istruzione senza che però sia necessario che la CPU compia alcuna azione.</text:p>
      <text:p text:style-name="Codice_20_C_23_"/>
      <text:p text:style-name="Codice_20_C_23_"/>
      <text:p text:style-name="Codice_20_C_23_"/>
      <text:p text:style-name="Codice_20_C_23_"/>
      <text:p text:style-name="Codice_20_C_23_"/>
      <text:h text:style-name="P31" text:outline-level="3"><text:bookmark-start text:name="__RefHeading___Toc99190785"/><text:span text:style-name="T13">NOT <text:s text:c="2"/></text:span><text:span text:style-name="T14">– <text:s text:c="2"/>Negazione logica (formazione del complemento a 1)</text:span><text:bookmark-end text:name="__RefHeading___Toc99190785"/></text:h>
      <text:p text:style-name="Corpo_20_del_20_testo_20_no_20_Rientro">Sintassi:</text:p>
      <text:p text:style-name="P21"><text:span text:style-name="T15">NOT </text:span><text:span text:style-name="T16">destinazione</text:span></text:p>
      <text:p text:style-name="Corpo_20_del_20_testo_20_no_20_Rientro">Operazione svolta:</text:p>
      <text:p text:style-name="P22">destinazione = complemento a 1 di destinazione</text:p>
      <text:p text:style-name="Corpo_20_del_20_testo_20_no_20_Rientro">Flag definiti:</text:p>
      <text:p text:style-name="P22">Nessuno</text:p>
      <text:p text:style-name="Corpo_20_del_20_testo_20_no_20_Rientro">Descrizione:</text:p>
      <text:p text:style-name="Corpo_20_del_20_testo_20_no_20_Rientro"><text:span text:style-name="T20">I</text:span>nverte ogni bit <text:span text:style-name="T20">di </text:span><text:span text:style-name="T6">destinazione</text:span>, producendo così il <text:span text:style-name="T20">suo </text:span>complemento a 1.</text:p>
      <text:p text:style-name="Corpo_20_del_20_testo_20_no_20_Rientro">Esempi:</text:p>
      <text:p text:style-name="Codice_20_C_23__20_iniziale">mov ax, 2</text:p>
      <text:p text:style-name="P12">not ax<text:tab/><text:tab/>// produce: -3 (FFFD in esadecim.)</text:p>
      <text:h text:style-name="P33" text:outline-level="3"><text:bookmark-start text:name="__RefHeading___Toc99190786"/><text:span text:style-name="T13">POP <text:s text:c="2"/></text:span><text:span text:style-name="T14">– <text:s text:c="2"/>Prelevamento dallo stack</text:span><text:bookmark-end text:name="__RefHeading___Toc99190786"/></text:h>
      <text:p text:style-name="Corpo_20_del_20_testo_20_no_20_Rientro">Sintassi:</text:p>
      <text:p text:style-name="P21"><text:span text:style-name="T15">POP </text:span><text:span text:style-name="T16">destinazione</text:span></text:p>
      <text:p text:style-name="Corpo_20_del_20_testo_20_no_20_Rientro">Operazione svolta:</text:p>
      <text:p text:style-name="P22">destinazione = valore che si trova in testa allo stack</text:p>
      <text:p text:style-name="P26">SP = SP + 1</text:p>
      <text:p text:style-name="P3">Flag definiti:</text:p>
      <text:p text:style-name="P22">Nessuno</text:p>
      <text:p text:style-name="Corpo_20_del_20_testo_20_no_20_Rientro">Descrizione:</text:p>
      <text:p text:style-name="Corpo_20_del_20_testo_20_no_20_Rientro"><text:span text:style-name="T20">C</text:span>opia in destinazione il contenuto della zona di memoria puntata da SP (testa dello stack). Dopodiché incrementa SP, in modo che punti al nuovo valore in testa allo stack.</text:p>
      <text:p text:style-name="Corpo_20_del_20_testo_20_no_20_Rientro">Esempi:</text:p>
      <text:p text:style-name="Codice_20_C_23__20_iniziale">pop ax<text:tab/><text:tab/>// copia in ax il valore memorizzato in testa allo stack</text:p>
      <text:p text:style-name="Codice_20_C_23_">pop [10]<text:tab/>// copia nella locazione [10] il valore situato in testa allo stack</text:p>
      <text:h text:style-name="P31" text:outline-level="3"><text:bookmark-start text:name="__RefHeading___Toc99190787"/><text:span text:style-name="T13">POPF <text:s text:c="2"/></text:span><text:span text:style-name="T14">– <text:s text:c="2"/>Prelevamento del registro dei flag dallo stack </text:span><text:bookmark-end text:name="__RefHeading___Toc99190787"/></text:h>
      <text:p text:style-name="Corpo_20_del_20_testo_20_no_20_Rientro">Sintassi:</text:p>
      <text:p text:style-name="P24">POPF</text:p>
      <text:p text:style-name="Corpo_20_del_20_testo_20_no_20_Rientro">Operazione svolta:</text:p>
      <text:p text:style-name="P22">flag<text:span text:style-name="T24">s</text:span> = valore che si trova in testa allo stack</text:p>
      <text:p text:style-name="P26">SP = SP + 1</text:p>
      <text:p text:style-name="P3">Flag definiti:</text:p>
      <text:p text:style-name="P22">SF, ZF, OF</text:p>
      <text:p text:style-name="Corpo_20_del_20_testo_20_no_20_Rientro">Descrizione:</text:p>
      <text:p text:style-name="P6"><text:span text:style-name="T22">C</text:span>opia nel registro dei flag il contenuto della zona di memoria puntata da SP (testa dello stack). Dopodiché incrementa SP, in modo che punti al nuovo valore in testa allo stack. </text:p>
      <text:p text:style-name="P6">Si presuppone che in precedenza il registro dei flag fosse stato copiato nello stack mediante l’istruzione PUSHF.</text:p>
      <text:p text:style-name="Corpo_20_del_20_testo_20_no_20_Rientro">Esempi:</text:p>
      <text:p text:style-name="Codice_20_C_23__20_iniziale">popf <text:tab/>// copia nel registro dei flag il valore memorizzato in testa allo stack</text:p>
      <text:p text:style-name="Codice_20_C_23_"/>
      <text:h text:style-name="P33" text:outline-level="3"><text:bookmark-start text:name="__RefHeading___Toc99190788"/><text:span text:style-name="T13">PUSH <text:s text:c="2"/></text:span><text:span text:style-name="T14">– <text:s text:c="2"/>Deposito di un valore nello stack</text:span><text:bookmark-end text:name="__RefHeading___Toc99190788"/></text:h>
      <text:p text:style-name="Corpo_20_del_20_testo_20_no_20_Rientro">Sintassi:</text:p>
      <text:p text:style-name="P21"><text:span text:style-name="T15">PUSH </text:span><text:span text:style-name="T16">sorgente</text:span></text:p>
      <text:p text:style-name="Corpo_20_del_20_testo_20_no_20_Rientro">Operazione svolta:</text:p>
      <text:p text:style-name="P22">SP = SP - 1</text:p>
      <text:p text:style-name="P25">sorgente viene memorizzato in testa allo stack</text:p>
      <text:p text:style-name="Corpo_20_del_20_testo_20_no_20_Rientro">Flag definiti:</text:p>
      <text:p text:style-name="P22">Nessuno</text:p>
      <text:p text:style-name="Corpo_20_del_20_testo_20_no_20_Rientro">Descrizione:</text:p>
      <text:p text:style-name="Corpo_20_del_20_testo_20_no_20_Rientro"><text:span text:style-name="T22">P</text:span>rima decrementa SP quindi copia <text:span text:style-name="T7">sorgente</text:span><text:span text:style-name="T22"> </text:span>nella zona di memoria puntata da SP (testa dello stack). </text:p>
      <text:p text:style-name="Corpo_20_del_20_testo_20_no_20_Rientro">Esempi:</text:p>
      <text:p text:style-name="Codice_20_C_23__20_iniziale">push ax<text:tab/><text:tab/><text:tab/>// copia ax in testa allo stack</text:p>
      <text:p text:style-name="Codice_20_C_23_">push [10]<text:tab/><text:tab/>// copia il contenuto della locazione [10] in testa allo stack</text:p>
      <text:h text:style-name="P33" text:outline-level="3"><text:bookmark-start text:name="__RefHeading___Toc99190789"/><text:soft-page-break/><text:span text:style-name="T13">PUSHF <text:s/></text:span><text:span text:style-name="T14">– <text:s text:c="2"/>Deposito del registro dei flag nello stack</text:span><text:bookmark-end text:name="__RefHeading___Toc99190789"/></text:h>
      <text:p text:style-name="Corpo_20_del_20_testo_20_no_20_Rientro">Sintassi:</text:p>
      <text:p text:style-name="P24">PUSHF</text:p>
      <text:p text:style-name="Corpo_20_del_20_testo_20_no_20_Rientro">Operazione svolta:</text:p>
      <text:p text:style-name="P22">SP = SP - 1</text:p>
      <text:p text:style-name="P25">il registro dei flag viene memorizzato in testa allo stack</text:p>
      <text:p text:style-name="Corpo_20_del_20_testo_20_no_20_Rientro">Flag definiti:</text:p>
      <text:p text:style-name="P22">Nessuno</text:p>
      <text:p text:style-name="Corpo_20_del_20_testo_20_no_20_Rientro">Descrizione:</text:p>
      <text:p text:style-name="P9"><text:span text:style-name="T22">P</text:span>rima decrementa SP quindi copia il registro dei flag nella zona di memoria puntata da SP (testa dello stack). Si presuppone che il registro venga successivamente ripristinato mediante l’istruzione POPF.</text:p>
      <text:p text:style-name="Corpo_20_del_20_testo_20_no_20_Rientro">Esempi:</text:p>
      <text:p text:style-name="P11">pushf <text:tab/><text:tab/>// copia il registro dei flag in testa allo stack</text:p>
      <text:h text:style-name="P36" text:outline-level="3"><text:bookmark-start text:name="__RefHeading___Toc99190790"/><text:span text:style-name="T13">RET <text:s/></text:span><text:span text:style-name="T14">– <text:s text:c="2"/>Ritorno da una procedura</text:span><text:bookmark-end text:name="__RefHeading___Toc99190790"/></text:h>
      <text:p text:style-name="Corpo_20_del_20_testo_20_no_20_Rientro">Sintassi:</text:p>
      <text:p text:style-name="P24">RET</text:p>
      <text:p text:style-name="Corpo_20_del_20_testo_20_no_20_Rientro">Operazione svolta:</text:p>
      <text:p text:style-name="P22">SP = SP + 1</text:p>
      <text:p text:style-name="P25">IP viene prelevato dallo stack</text:p>
      <text:p text:style-name="Corpo_20_del_20_testo_20_no_20_Rientro">Flag definiti:</text:p>
      <text:p text:style-name="P22">Nessuno</text:p>
      <text:p text:style-name="Corpo_20_del_20_testo_20_no_20_Rientro">Descrizione:</text:p>
      <text:p text:style-name="P6"><text:span text:style-name="T22">M</text:span>odifica il flusso di esecuzione delle istruzioni, prelevando IP dallo stack e quindi assegnandogli un nuovo indirizzo nella memoria delle istruzioni. </text:p>
      <text:p text:style-name="P10">Si <text:span text:style-name="T22">suppone </text:span>che RET termini una procedura che sia stata precedentemente avviata da un’istruzione CALL.</text:p>
      <text:p text:style-name="Corpo_20_del_20_testo_20_no_20_Rientro">Esempi:</text:p>
      <text:p text:style-name="P19">call ciclo<text:tab/><text:tab/>// IP punta alla istruzione designata da "ciclo"</text:p>
      <text:p text:style-name="P13">...</text:p>
      <text:p text:style-name="P13">ciclo: <text:span text:style-name="T11">&lt;inizio della procedura&gt;</text:span></text:p>
      <text:p text:style-name="P14">...</text:p>
      <text:p text:style-name="Codice_20_C_23_">ret <text:tab/>// ritorno all’istruzione successiva a CALL</text:p>
      <text:h text:style-name="P33" text:outline-level="3"><text:bookmark-start text:name="__RefHeading___Toc99190791"/><text:soft-page-break/><text:span text:style-name="T13">SHL <text:s text:c="2"/></text:span><text:span text:style-name="T14">– <text:s text:c="2"/>Shift logico a sinistra</text:span><text:bookmark-end text:name="__RefHeading___Toc99190791"/></text:h>
      <text:p text:style-name="Corpo_20_del_20_testo_20_no_20_Rientro">Sintassi:</text:p>
      <text:p text:style-name="P21"><text:span text:style-name="T15">SHL </text:span><text:span text:style-name="T16">destinazione</text:span><text:span text:style-name="T15">, </text:span><text:span text:style-name="T16">contatore</text:span></text:p>
      <text:p text:style-name="Corpo_20_del_20_testo_20_no_20_Rientro">Operazione svolta:</text:p>
      <text:p text:style-name="P22">sposta a sinistra i bit dell’operando, impostando a zero il bit di ordine inferiore (bit più a destra)</text:p>
      <text:p text:style-name="P3">Flag definiti:</text:p>
      <text:p text:style-name="P23">SF, ZF</text:p>
      <text:p text:style-name="Corpo_20_del_20_testo_20_no_20_Rientro">Descrizione:</text:p>
      <text:p text:style-name="Corpo_20_del_20_testo_20_no_20_Rientro"><text:span text:style-name="T23">S</text:span>posta a sinistra i bit d<text:span text:style-name="T23">i </text:span><text:span text:style-name="T8">destinazione</text:span><text:span text:style-name="T23"> </text:span>per un numero di posizioni equivalente a <text:span text:style-name="T8">contatore</text:span>. Ad ogni spostamento, nel bit più a destra viene memorizzato il valore zero.</text:p>
      <text:p text:style-name="Corpo_20_del_20_testo_20_no_20_Rientro">Esempi:</text:p>
      <text:p text:style-name="Codice_20_C_23__20_iniziale">mov ax, 2</text:p>
      <text:p text:style-name="Codice_20_C_23_">shl ax, 3<text:tab/><text:tab/>// produce: 10</text:p>
      <text:h text:style-name="P33" text:outline-level="3"><text:bookmark-start text:name="__RefHeading___Toc99190792"/><text:span text:style-name="T13">SHR <text:s text:c="2"/></text:span><text:span text:style-name="T14">– <text:s text:c="2"/>Shift logico a destra</text:span><text:bookmark-end text:name="__RefHeading___Toc99190792"/></text:h>
      <text:p text:style-name="Corpo_20_del_20_testo_20_no_20_Rientro">Sintassi:</text:p>
      <text:p text:style-name="P21"><text:span text:style-name="T15">SHR </text:span><text:span text:style-name="T16">destinazione</text:span><text:span text:style-name="T15">, </text:span><text:span text:style-name="T16">contatore</text:span></text:p>
      <text:p text:style-name="Corpo_20_del_20_testo_20_no_20_Rientro">Operazione svolta:</text:p>
      <text:p text:style-name="P22">sposta a destra i bit dell’operando, impostando a zero il bit di ordine superiore (bit più a sinistra)</text:p>
      <text:p text:style-name="P3">Flag definiti:</text:p>
      <text:p text:style-name="P23">SF, ZF</text:p>
      <text:p text:style-name="Corpo_20_del_20_testo_20_no_20_Rientro">Descrizione:</text:p>
      <text:p text:style-name="Corpo_20_del_20_testo_20_no_20_Rientro"><text:span text:style-name="T23">S</text:span>posta a destra i bit <text:span text:style-name="T23">di </text:span><text:span text:style-name="T4">destinazione</text:span> per un numero di posizioni equivalente a <text:span text:style-name="T4">contatore</text:span>. Ad ogni spostamento, nel bit più a sinistra viene memorizzato il valore zero.</text:p>
      <text:p text:style-name="Corpo_20_del_20_testo_20_no_20_Rientro">Esempi:</text:p>
      <text:p text:style-name="Codice_20_C_23__20_iniziale">mov ax, 4</text:p>
      <text:p text:style-name="P12">shr ax, 2<text:tab/><text:tab/>// produce: 1</text:p>
      <text:h text:style-name="P33" text:outline-level="3"><text:bookmark-start text:name="__RefHeading___Toc99190793"/><text:soft-page-break/><text:span text:style-name="T13">STOP <text:s text:c="2"/></text:span><text:span text:style-name="T14">– <text:s text:c="2"/>Arresta la CPU</text:span><text:bookmark-end text:name="__RefHeading___Toc99190793"/></text:h>
      <text:p text:style-name="Corpo_20_del_20_testo_20_no_20_Rientro">Sintassi:</text:p>
      <text:p text:style-name="P24">STOP</text:p>
      <text:p text:style-name="Corpo_20_del_20_testo_20_no_20_Rientro">Operazione svolta:</text:p>
      <text:p text:style-name="P22">Arresta la CPU, terminando l’esecuzione del programma</text:p>
      <text:p text:style-name="Corpo_20_del_20_testo_20_no_20_Rientro">Flag definiti:</text:p>
      <text:p text:style-name="P22">Nessuno</text:p>
      <text:p text:style-name="Corpo_20_del_20_testo_20_no_20_Rientro">Descrizione:</text:p>
      <text:p text:style-name="Corpo_20_del_20_testo_20_no_20_Rientro"><text:span text:style-name="T23">Arresta </text:span>l’esecuzione del programma. </text:p>
      <text:h text:style-name="P33" text:outline-level="3"><text:bookmark-start text:name="__RefHeading___Toc99190794"/><text:span text:style-name="T13">SUB</text:span><text:span text:style-name="T14"> <text:s text:c="2"/>– <text:s text:c="2"/>Sottrazione</text:span><text:bookmark-end text:name="__RefHeading___Toc99190794"/></text:h>
      <text:p text:style-name="Corpo_20_del_20_testo_20_no_20_Rientro">Sintassi:</text:p>
      <text:p text:style-name="P21"><text:span text:style-name="T15">SUB </text:span><text:span text:style-name="T16">destinazione</text:span><text:span text:style-name="T15">, </text:span><text:span text:style-name="T16">sorgente</text:span></text:p>
      <text:p text:style-name="Corpo_20_del_20_testo_20_no_20_Rientro">Operazione svolta:</text:p>
      <text:p text:style-name="P22">destinazione = destinazione - sorgente</text:p>
      <text:p text:style-name="Corpo_20_del_20_testo_20_no_20_Rientro">Flag definiti:</text:p>
      <text:p text:style-name="P21"><text:span text:style-name="T9">SF</text:span><text:span text:style-name="T10">, </text:span><text:span text:style-name="T9">ZF, OF</text:span></text:p>
      <text:p text:style-name="Corpo_20_del_20_testo_20_no_20_Rientro">Descrizione:</text:p>
      <text:p text:style-name="Corpo_20_del_20_testo_20_no_20_Rientro"><text:span text:style-name="T23">Sottrae </text:span><text:span text:style-name="T8">sorgente</text:span><text:span text:style-name="T23"> a </text:span><text:span text:style-name="T4">destinazione</text:span>; il risultato viene memorizzato <text:span text:style-name="T23">in </text:span><text:span text:style-name="T4">destinazione</text:span>. </text:p>
      <text:p text:style-name="Corpo_20_del_20_testo_20_no_20_Rientro">Esempi:</text:p>
      <text:p text:style-name="P20">sub ax, bx<text:tab/><text:tab/><text:tab/>// equivale a: ax = ax - bx</text:p>
      <text:p text:style-name="Codice_20_C_23_">sub [10], 2<text:tab/><text:tab/>// equivale a: [1] = [1] - 2</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3"><text:bookmark-start text:name="__RefHeading___Toc99190795"/><text:soft-page-break/><text:span text:style-name="T13">XOR <text:s text:c="2"/></text:span><text:span text:style-name="T14">– <text:s text:c="2"/>Or esclusivo</text:span><text:bookmark-end text:name="__RefHeading___Toc99190795"/></text:h>
      <text:p text:style-name="Corpo_20_del_20_testo_20_no_20_Rientro">Sintassi:</text:p>
      <text:p text:style-name="P21"><text:span text:style-name="T15">XOR </text:span><text:span text:style-name="T16">destinazione</text:span><text:span text:style-name="T15">, </text:span><text:span text:style-name="T16">contatore</text:span></text:p>
      <text:p text:style-name="P22">destinazione = destinazione ^ sorgente</text:p>
      <text:p text:style-name="Corpo_20_del_20_testo_20_no_20_Rientro">Flag definiti:</text:p>
      <text:p text:style-name="P21"><text:span text:style-name="T9">SF</text:span><text:span text:style-name="T10">, </text:span><text:span text:style-name="T9">ZF, OF = 0</text:span></text:p>
      <text:p text:style-name="Corpo_20_del_20_testo_20_no_20_Rientro">Descrizione:</text:p>
      <text:p text:style-name="P7"><text:span text:style-name="T23">I</text:span>mposta a 1 i bit del risultato se entrambi i bit corrispondenti dei due operandi sono diversi tra loro; altrimenti li imposta a 0. </text:p>
      <text:p text:style-name="P7"><text:span text:style-name="T23">Memorizza i</text:span>l risultato <text:span text:style-name="T23">in </text:span>destinazione.</text:p>
      <text:p text:style-name="Corpo_20_del_20_testo_20_no_20_Rientro">Esempio:</text:p>
      <text:p text:style-name="Codice_20_C_23__20_iniziale">mov ax, 2</text:p>
      <text:p text:style-name="Codice_20_C_23_">xor ax, 4<text:tab/><text:tab/>// produce come risultato: 6</text:p>
      <text:h text:style-name="Heading_20_2" text:outline-level="2"><text:bookmark-start text:name="__RefHeading___Toc99190796"/>Struttura di un programma assembly<text:bookmark-end text:name="__RefHeading___Toc99190796"/></text:h>
      <text:p text:style-name="P8">I programmi EasyCPU sono suddivisi in due sezioni, <text:span text:style-name="T4">codice</text:span> e <text:span text:style-name="T4">dati</text:span>. </text:p>
      <text:p text:style-name="P8">La sezione <text:span text:style-name="T4">codice</text:span> contiene le istruzioni e comincia con l’inizio del file. La parte <text:span text:style-name="T4">dati</text:span>, opzionale, è preceduta dalla direttiva <text:span text:style-name="T4">.DATA</text:span> e consente di inizializzare il contenuto di una o più celle di memoria. </text:p>
      <text:p text:style-name="P8">All’interno dell’IDE, le due sezioni vengono gestite mediante due editor separati. </text:p>
      <text:p text:style-name="P8">Un programma può contenere delle righe di commento, prefissate dal simbolo “//”. Un commento può anche seguire il testo di un’istruzione. </text:p>
      <text:p text:style-name="Text_20_body">Di seguito viene riportato un programma di esempio che calcola la somma degli elementi dispari all’interno di un sequenza. Questa è definita nella sezione dati a partire dell’indirizzo 1 di memoria. All’indirizzo 0 è memorizzato il numero di elementi.</text:p>
      <text:p text:style-name="Codice_20_C_23__20_iniziale">// Programma SommaDispari</text:p>
      <text:p text:style-name="Codice_20_C_23_">// Calcola la somma degli elementi dispari di un vettore e la memorizz in BX</text:p>
      <text:p text:style-name="Codice_20_C_23_"/>
      <text:p text:style-name="Codice_20_C_23_"><text:tab/><text:tab/>mov bx, 0<text:tab/><text:tab/><text:tab/>// bx memorizza la somma</text:p>
      <text:p text:style-name="Codice_20_C_23_"><text:tab/><text:tab/>mov cx, [0]<text:tab/><text:tab/>// memorizza in cx il numero degli elementi</text:p>
      <text:p text:style-name="Codice_20_C_23_"><text:tab/><text:tab/>mov si, [1]<text:tab/><text:tab/>// si memorizza l'indirizzo del vettore</text:p>
      <text:p text:style-name="Codice_20_C_23_"><text:tab/></text:p>
      <text:p text:style-name="Codice_20_C_23_">ciclo:<text:tab/>cmp cx, 0<text:tab/><text:tab/><text:tab/>// verifica se il ciclo è finito</text:p>
      <text:p text:style-name="Codice_20_C_23_"><text:tab/><text:tab/>je fine</text:p>
      <text:p text:style-name="Codice_20_C_23_"><text:tab/></text:p>
      <text:p text:style-name="Codice_20_C_23_"><text:tab/><text:tab/>mov ax,[si]<text:tab/><text:tab/>// preleva l'elemento</text:p>
      <text:p text:style-name="Codice_20_C_23_"><text:tab/><text:tab/>mov dx, 0<text:tab/><text:tab/><text:tab/>// non obbligatoria</text:p>
      <text:p text:style-name="Codice_20_C_23_"><text:tab/><text:tab/>div 2<text:tab/><text:tab/><text:tab/><text:tab/>// divide per 2 per ottenere il resto in dx</text:p>
      <text:p text:style-name="Codice_20_C_23_"><text:tab/><text:tab/>cmp dx, 0<text:tab/><text:tab/><text:tab/>// se dx è 0 il numero è pari</text:p>
      <text:p text:style-name="Codice_20_C_23_"><text:tab/><text:tab/>je pari<text:tab/><text:tab/></text:p>
      <text:p text:style-name="Codice_20_C_23_"><text:tab/><text:tab/>add bx, [si]<text:tab/><text:tab/>// somma l'elemento</text:p>
      <text:p text:style-name="Codice_20_C_23_">pari:</text:p>
      <text:p text:style-name="Codice_20_C_23_"><text:tab/><text:tab/>inc si</text:p>
      <text:p text:style-name="Codice_20_C_23_"><text:tab/><text:tab/>dec cx</text:p>
      <text:p text:style-name="Codice_20_C_23_"><text:tab/>jmp ciclo</text:p>
      <text:p text:style-name="Codice_20_C_23_"/>
      <text:p text:style-name="Codice_20_C_23_">fine:<text:tab/></text:p>
      <text:p text:style-name="P15"><text:tab/>stop</text:p>
      <text:p text:style-name="Codice_20_C_23_"><text:tab/><text:tab/></text:p>
      <text:p text:style-name="Codice_20_C_23_">.DATA</text:p>
      <text:p text:style-name="Codice_20_C_23_">0: 5</text:p>
      <text:p text:style-name="Codice_20_C_23_">1: 1, 3, 4, 6,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paragraph-properties fo:margin-left="0cm" fo:margin-right="0cm" fo:margin-top="0.199cm" fo:margin-bottom="0cm" loext:contextual-spacing="false" fo:line-height="125%" fo:text-align="justify" style:justify-single-word="false" fo:orphans="2" fo:widows="2" fo:text-indent="0cm" style:auto-text-indent="false" fo:background-color="transparent">
        <style:background-image/>
      </style:paragraph-properties>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paragraph-properties fo:margin-left="0.501cm" fo:margin-right="0cm" fo:margin-top="0.176cm" fo:margin-bottom="0.176cm" loext:contextual-spacing="false" fo:text-indent="0.63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Standard" style:default-outline-level="1" style:class="text">
      <style:paragraph-properties fo:margin-top="0cm" fo:margin-bottom="1.058cm" loext:contextual-spacing="false" fo:text-align="end" style:justify-single-word="false" fo:orphans="2" fo:widows="2" fo:break-before="page" fo:padding-left="0cm" fo:padding-right="0cm" fo:padding-top="0.035cm" fo:padding-bottom="0.035cm" fo:border-left="none" fo:border-right="none" fo:border-top="0.51pt solid #000000" fo:border-bottom="0.51pt solid #000000" fo:keep-with-next="always"/>
      <style:text-properties style:use-window-font-color="true" style:font-name="Arial" fo:font-family="Arial" style:font-family-generic="swiss" style:font-pitch="variable" fo:font-size="21pt" fo:language="it" fo:country="IT" fo:font-weight="bold" style:letter-kerning="true" style:font-name-asian="Times New Roman" style:font-family-asian="'Times New Roman'" style:font-family-generic-asian="roman" style:font-pitch-asian="variable" style:font-size-asian="21pt" style:font-weight-asian="bold" style:font-name-complex="Arial" style:font-family-complex="Arial" style:font-family-generic-complex="swiss" style:font-pitch-complex="variable" style:font-size-complex="10pt" style:language-complex="ar" style:country-complex="SA"/>
    </style:style>
    <style:style style:name="Heading_20_2" style:display-name="Heading 2" style:family="paragraph" style:next-style-name="Corpo_20_del_20_testo_20_no_20_Rientro" style:default-outline-level="2" style:class="text">
      <style:paragraph-properties fo:margin-top="0cm" fo:margin-bottom="0.353cm" loext:contextual-spacing="false" fo:orphans="2" fo:widows="2" fo:break-before="page" fo:keep-with-next="always"/>
      <style:text-properties fo:font-variant="small-caps" style:use-window-font-color="true" style:font-name="Arial" fo:font-family="Arial" style:font-family-generic="swiss" style:font-pitch="variable" fo:font-size="14pt" fo:language="it" fo:country="I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Heading_20_3" style:display-name="Heading 3" style:family="paragraph" style:next-style-name="Corpo_20_del_20_testo_20_no_20_Rientro" style:default-outline-level="3" style:class="text">
      <style:paragraph-properties fo:margin-top="0.423cm" fo:margin-bottom="0.106cm" loext:contextual-spacing="false" fo:orphans="2" fo:widows="2" fo:keep-with-next="always"/>
      <style:text-properties style:use-window-font-color="true" style:font-name="Arial" fo:font-family="Arial" style:font-family-generic="swiss" style:font-pitch="variable" fo:font-size="12pt" fo:language="it" fo:country="I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ing_20_4" style:display-name="Heading 4" style:family="paragraph" style:next-style-name="Standard" style:default-outline-level="4" style:class="text">
      <style:paragraph-properties fo:margin-top="0.423cm" fo:margin-bottom="0.106cm" loext:contextual-spacing="false" fo:orphans="2" fo:widows="2" fo:keep-with-next="always"/>
      <style:text-properties style:use-window-font-color="true" style:font-name="Times New Roman" fo:font-family="'Times New Roman'" style:font-family-generic="roman" style:font-pitch="variable" fo:font-size="12pt" fo:language="it" fo:country="I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margin-top="0.423cm" fo:margin-bottom="0cm" loext:contextual-spacing="false"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top="1.905cm" fo:margin-bottom="0cm" loext:contextual-spacing="false" fo:text-align="center" style:justify-single-word="false" fo:keep-with-next="always"/>
      <style:text-properties fo:color="#c0c0c0" style:font-name="Verdana" fo:font-family="Verdana" style:font-family-generic="swiss" style:font-pitch="variable" fo:font-size="48pt" fo:font-weight="bold" style:font-size-asian="48pt" style:font-weight-asian="bold" style:font-name-complex="Verdana" style:font-family-complex="Verdana" style:font-family-generic-complex="swiss" style:font-pitch-complex="variable"/>
    </style:style>
    <style:style style:name="Corpo_20_del_20_testo_20_no_20_Rientro" style:display-name="Corpo del testo no Rientro" style:family="paragraph" style:parent-style-name="Text_20_body" style:next-style-name="Text_20_body">
      <style:paragraph-properties fo:margin-left="0cm" fo:margin-right="0cm" fo:margin-top="0.199cm" fo:margin-bottom="0cm" loext:contextual-spacing="false" fo:text-indent="0cm" style:auto-text-indent="false"/>
    </style:style>
    <style:style style:name="Codice_20_C_23_" style:display-name="Codice C#" style:family="paragraph" style:parent-style-name="Text_20_body">
      <style:paragraph-properties fo:margin-left="0cm" fo:margin-right="0cm" fo:margin-top="0cm" fo:margin-bottom="0cm" loext:contextual-spacing="false" fo:line-height="140%" fo:text-align="start" style:justify-single-word="false" fo:text-indent="0cm" style:auto-text-indent="false" fo:background-color="#e6e6ff">
        <style:tab-stops>
          <style:tab-stop style:position="0.75cm"/>
          <style:tab-stop style:position="1.501cm"/>
          <style:tab-stop style:position="2.251cm"/>
          <style:tab-stop style:position="3cm"/>
          <style:tab-stop style:position="3.75cm"/>
          <style:tab-stop style:position="4.501cm"/>
        </style:tab-stops>
        <style:background-image/>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Algoritmi" style:family="paragraph" style:parent-style-name="Codice_20_C_23_">
      <style:paragraph-properties fo:margin-top="0.212cm" fo:margin-bottom="0cm" loext:contextual-spacing="false">
        <style:tab-stops>
          <style:tab-stop style:position="0.75cm"/>
          <style:tab-stop style:position="1.501cm"/>
          <style:tab-stop style:position="2.251cm"/>
          <style:tab-stop style:position="3cm"/>
          <style:tab-stop style:position="3.75cm"/>
          <style:tab-stop style:position="4.501cm"/>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Codice_20_C_23__20_Grassetto_20_e_20_centrato" style:display-name="Codice C# Grassetto e centrato" style:family="paragraph" style:parent-style-name="Codice_20_C_23_">
      <style:paragraph-properties fo:text-align="center" style:justify-single-word="false"/>
      <style:text-properties fo:font-weight="bold" style:font-weight-asian="bold"/>
    </style:style>
    <style:style style:name="Algoritmi_20_Grassetto_20_e_20_centrato" style:display-name="Algoritmi Grassetto e centrato" style:family="paragraph" style:parent-style-name="Codice_20_C_23__20_Grassetto_20_e_20_centrato">
      <style:paragraph-properties fo:margin-top="0.212cm" fo:margin-bottom="0cm" loext:contextual-spacing="false">
        <style:tab-stops>
          <style:tab-stop style:position="0.75cm"/>
          <style:tab-stop style:position="1.501cm"/>
          <style:tab-stop style:position="2.251cm"/>
          <style:tab-stop style:position="3cm"/>
          <style:tab-stop style:position="3.75cm"/>
          <style:tab-stop style:position="4.501cm"/>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Algoritmi_20_maiuscoletto" style:display-name="Algoritmi maiuscoletto" style:family="paragraph" style:parent-style-name="Standard">
      <style:paragraph-properties fo:margin-top="0.212cm" fo:margin-bottom="0cm" loext:contextual-spacing="false">
        <style:tab-stops>
          <style:tab-stop style:position="16.503cm" style:type="right"/>
        </style:tab-stops>
      </style:paragraph-properties>
      <style:text-properties style:font-name="Verdana" fo:font-family="Verdana" style:font-family-generic="swiss" style:font-pitch="variable" style:font-name-complex="Verdana" style:font-family-complex="Verdana" style:font-family-generic-complex="swiss" style:font-pitch-complex="variable"/>
    </style:style>
    <style:style style:name="Corpo_20_come_20_Titolo_20_2" style:display-name="Corpo come Titolo 2" style:family="paragraph" style:parent-style-name="Text_20_body">
      <style:paragraph-properties fo:margin-left="0cm" fo:margin-right="0cm" fo:margin-top="0.423cm" fo:margin-bottom="0.282cm" loext:contextual-spacing="false" fo:text-indent="0cm" style:auto-text-indent="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rpo_20_come_20_Titolo_20_3" style:display-name="Corpo come Titolo 3" style:family="paragraph" style:parent-style-name="Corpo_20_come_20_Titolo_20_2"/>
    <style:style style:name="Corpo_20_come_20_Titolo_20_4" style:display-name="Corpo come Titolo 4" style:family="paragraph" style:parent-style-name="Text_20_body" style:next-style-name="Corpo_20_del_20_testo_20_no_20_Rientro">
      <style:paragraph-properties fo:margin-left="0cm" fo:margin-right="0cm" fo:margin-top="0.353cm" fo:margin-bottom="0cm" loext:contextual-spacing="false" fo:text-indent="0cm" style:auto-text-indent="false"/>
      <style:text-properties style:font-name="Verdana" fo:font-family="Verdana" style:font-family-generic="swiss" style:font-pitch="variable" fo:font-style="italic" style:font-style-asian="italic" style:font-name-complex="Verdana" style:font-family-complex="Verdana" style:font-family-generic-complex="swiss" style:font-pitch-complex="variable"/>
    </style:style>
    <style:style style:name="Corpo_20_del_20_testo_20_2" style:display-name="Corpo del testo 2" style:family="paragraph" style:parent-style-name="Standard">
      <style:paragraph-properties fo:margin-top="0.28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rpo_20_testo_20_x_20_tabelle" style:display-name="Corpo testo x tabelle" style:family="paragraph" style:parent-style-name="Text_20_body">
      <style:paragraph-properties fo:margin-left="0cm" fo:margin-right="0cm" fo:text-indent="0cm"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Definizione" style:family="paragraph" style:parent-style-name="Text_20_body" style:next-style-name="Corpo_20_del_20_testo_20_no_20_Rientro">
      <style:paragraph-properties fo:margin-left="0cm" fo:margin-right="0cm" fo:margin-top="0.353cm" fo:margin-bottom="0.176cm" loext:contextual-spacing="false" fo:text-indent="0cm" style:auto-text-indent="false"/>
      <style:text-properties style:font-name="Verdana" fo:font-family="Verdana" style:font-family-generic="swiss" style:font-pitch="variable" fo:font-size="10pt" fo:font-weight="bold" style:font-size-asian="10pt" style:font-weight-asian="bold" style:font-name-complex="Verdana" style:font-family-complex="Verdana" style:font-family-generic-complex="swiss" style:font-pitch-complex="variable"/>
    </style:style>
    <style:style style:name="Addressee" style:family="paragraph" style:parent-style-name="Heading_20_2" style:default-outline-level="" style:list-style-name="" style:class="extra">
      <style:paragraph-properties fo:margin-left="0cm" fo:margin-right="0cm" fo:margin-top="0cm" fo:margin-bottom="0cm" loext:contextual-spacing="false" fo:line-height="150%" fo:text-align="end" style:justify-single-word="false" fo:text-indent="0cm" style:auto-text-indent="false"/>
      <style:text-properties fo:font-variant="normal" fo:text-transform="none" fo:color="#000000" style:font-name="Times New Roman" fo:font-family="'Times New Roman'" style:font-family-generic="roman" style:font-pitch="variable" fo:font-style="italic" fo:font-weight="normal" style:font-style-asian="italic" style:font-weight-asian="normal" style:font-name-complex="Times New Roman" style:font-family-complex="'Times New Roman'" style:font-family-generic-complex="roman" style:font-pitch-complex="variable"/>
    </style:style>
    <style:style style:name="Elenco_20_Quadrato" style:display-name="Elenco Quadrato" style:family="paragraph" style:parent-style-name="List" style:list-style-name="WW8Num12">
      <style:paragraph-properties fo:margin-left="1.131cm" fo:margin-right="0cm" fo:text-indent="-0.63cm" style:auto-text-indent="false"/>
    </style:style>
    <style:style style:name="Elenco_20_Lettera" style:display-name="Elenco Lettera" style:family="paragraph" style:parent-style-name="Elenco_20_Quadrato" style:list-style-name="WW8Num1"/>
    <style:style style:name="Sintassi_20_codice" style:display-name="Sintassi codice" style:family="paragraph" style:parent-style-name="Codice_20_C_23_" style:next-style-name="Corpo_20_del_20_testo_20_no_20_Rientro">
      <style:paragraph-properties fo:margin-top="0.353cm" fo:margin-bottom="0cm" loext:contextual-spacing="false" fo:text-align="center" style:justify-single-word="false"/>
    </style:style>
    <style:style style:name="Elenco_20_Numeri" style:display-name="Elenco Numeri" style:family="paragraph" style:parent-style-name="Elenco_20_Lettera" style:list-style-name="WW8Num9"/>
    <style:style style:name="Elenco_20_Pallino" style:display-name="Elenco Pallino" style:family="paragraph" style:parent-style-name="List" style:list-style-name="WW8Num20">
      <style:paragraph-properties fo:margin-top="0.353cm" fo:margin-bottom="0.176cm" loext:contextual-spacing="false"/>
    </style:style>
    <style:style style:name="Inizio_20_Codice" style:display-name="Inizio Codice" style:family="paragraph" style:parent-style-name="Codice_20_C_23_" style:next-style-name="Codice_20_C_23_">
      <style:paragraph-properties fo:margin-top="0.353cm" fo:margin-bottom="0cm" loext:contextual-spacing="false" fo:padding-left="0cm" fo:padding-right="0cm" fo:padding-top="0.035cm" fo:padding-bottom="0cm" fo:border-left="none" fo:border-right="none" fo:border-top="0.51pt solid #000000" fo:border-bottom="none">
        <style:tab-stops>
          <style:tab-stop style:position="0.75cm"/>
          <style:tab-stop style:position="1.501cm"/>
          <style:tab-stop style:position="2.251cm"/>
          <style:tab-stop style:position="3cm"/>
          <style:tab-stop style:position="3.75cm"/>
          <style:tab-stop style:position="4.501cm"/>
          <style:tab-stop style:position="13.503cm" style:type="right"/>
        </style:tab-stops>
      </style:paragraph-properties>
    </style:style>
    <style:style style:name="Fine_20_Codice" style:display-name="Fine Codice" style:family="paragraph" style:parent-style-name="Inizio_20_Codice" style:next-style-name="Corpo_20_del_20_testo_20_no_20_Rientro">
      <style:paragraph-properties fo:margin-top="0cm" fo:margin-bottom="0.176cm" loext:contextual-spacing="false" fo:padding-left="0cm" fo:padding-right="0cm" fo:padding-top="0cm" fo:padding-bottom="0.035cm" fo:border-left="none" fo:border-right="none" fo:border-top="none" fo:border-bottom="0.51pt solid #000000">
        <style:tab-stops>
          <style:tab-stop style:position="0.75cm"/>
          <style:tab-stop style:position="2.251cm"/>
          <style:tab-stop style:position="3cm"/>
          <style:tab-stop style:position="3.75cm"/>
          <style:tab-stop style:position="4.501cm"/>
          <style:tab-stop style:position="13.503cm" style:type="right"/>
        </style:tab-stops>
      </style:paragraph-properties>
    </style:style>
    <style:style style:name="Inizio_20_Algoritmo" style:display-name="Inizio Algoritmo" style:family="paragraph" style:parent-style-name="Text_20_body">
      <style:paragraph-properties fo:padding-left="0cm" fo:padding-right="0cm" fo:padding-top="0cm" fo:padding-bottom="0.035cm" fo:border-left="none" fo:border-right="none" fo:border-top="none" fo:border-bottom="0.51pt solid #000000"/>
    </style:style>
    <style:style style:name="Header" style:family="paragraph" style:parent-style-name="Standard" style:class="extra">
      <style:paragraph-properties fo:margin-top="0cm" fo:margin-bottom="0.423cm" loext:contextual-spacing="false" fo:padding-left="0cm" fo:padding-right="0cm" fo:padding-top="0cm" fo:padding-bottom="0.035cm" fo:border-left="none" fo:border-right="none" fo:border-top="none" fo:border-bottom="0.51pt solid #000000">
        <style:tab-stops>
          <style:tab-stop style:position="8.5cm" style:type="center"/>
          <style:tab-stop style:position="17cm" style:type="right"/>
        </style:tab-stops>
      </style:paragraph-properties>
    </style:style>
    <style:style style:name="Riquadro_20_grigio" style:display-name="Riquadro grigio" style:family="paragraph" style:parent-style-name="Text_20_body" style:next-style-name="Riquadro_20_grigio_20_corpo_20_testo">
      <style:paragraph-properties fo:margin-left="0.25cm" fo:margin-right="0.245cm" fo:margin-top="0.353cm" fo:margin-bottom="0cm" loext:contextual-spacing="false" fo:text-indent="0cm" style:auto-text-indent="false" fo:background-color="#e5e5e5" style:border-line-width-left="0.053cm 0.026cm 0.026cm" style:border-line-width-right="0.026cm 0.026cm 0.053cm" style:border-line-width-top="0.053cm 0.026cm 0.026cm" style:border-line-width-bottom="0.026cm 0.026cm 0.053cm" fo:padding-left="0.141cm" fo:padding-right="0.141cm" fo:padding-top="0.035cm" fo:padding-bottom="0.035cm" fo:border-left="3pt double #808080" fo:border-right="3pt double #808080" fo:border-top="3pt double #808080" fo:border-bottom="3pt double #808080">
        <style:background-image/>
      </style:paragraph-properties>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Riquadro_20_grigio_20_corpo_20_testo" style:display-name="Riquadro grigio corpo testo" style:family="paragraph" style:parent-style-name="Riquadro_20_grigio">
      <style:paragraph-properties fo:margin-left="0.25cm" fo:margin-right="0.245cm" fo:margin-top="0cm" fo:margin-bottom="0cm" loext:contextual-spacing="false" fo:text-indent="0.501cm"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SottoTitolo_20_1" style:display-name="SottoTitolo 1" style:family="paragraph">
      <style:paragraph-properties fo:margin-left="3.501cm" fo:margin-right="0cm" fo:margin-top="1.058cm" fo:margin-bottom="0.212cm" loext:contextual-spacing="false" fo:orphans="2" fo:widows="2" fo:text-indent="0cm" style:auto-text-indent="false"/>
      <style:text-properties style:use-window-font-color="true" style:font-name="Arial" fo:font-family="Arial" style:font-family-generic="swiss" style:font-pitch="variable" fo:font-size="16pt" fo:language="it" fo:country="IT"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SottoTitolo_20_2" style:display-name="SottoTitolo 2" style:family="paragraph" style:parent-style-name="SottoTitolo_20_1">
      <style:paragraph-properties fo:margin-left="5.001cm" fo:margin-right="0cm" fo:margin-top="0.423cm" fo:margin-bottom="0.212cm" loext:contextual-spacing="false" fo:text-indent="0cm" style:auto-text-indent="false"/>
      <style:text-properties fo:font-weight="normal" style:font-weight-asian="normal"/>
    </style:style>
    <style:style style:name="Titolo_20_2_20_Inverso" style:display-name="Titolo 2 Inverso" style:family="paragraph" style:parent-style-name="Heading_20_2" style:next-style-name="Corpo_20_come_20_Titolo_20_2" style:default-outline-level="" style:list-style-name="">
      <style:paragraph-properties fo:background-color="#c0c0c0">
        <style:background-image/>
      </style:paragraph-properties>
      <style:text-properties fo:color="#ffffff"/>
    </style:style>
    <style:style style:name="Output_20_console" style:display-name="Output console" style:family="paragraph" style:parent-style-name="Codice_20_C_23_" style:next-style-name="Corpo_20_del_20_testo_20_no_20_Rientro">
      <style:paragraph-properties fo:margin-top="0.353cm" fo:margin-bottom="0.176cm" loext:contextual-spacing="false"/>
      <style:text-properties fo:font-weight="bold" style:font-weight-asian="bold"/>
    </style:style>
    <style:style style:name="Titoli_20_tabella" style:display-name="Titoli tabella" style:family="paragraph" style:parent-style-name="Corpo_20_testo_20_x_20_tabelle">
      <style:paragraph-properties fo:text-align="center" style:justify-single-word="false"/>
      <style:text-properties fo:font-variant="small-caps" fo:font-weight="bold" style:font-weight-asian="bold"/>
    </style:style>
    <style:style style:name="Corpo_20_testo_20_titoli_20_x_20_tabelle" style:display-name="Corpo testo titoli x tabelle" style:family="paragraph" style:parent-style-name="Corpo_20_testo_20_x_20_tabelle">
      <style:paragraph-properties fo:text-align="center" style:justify-single-word="false"/>
      <style:text-properties fo:font-variant="small-caps" fo:font-weight="bold" style:font-weight-asian="bold"/>
    </style:style>
    <style:style style:name="Singola_20_riga_20_codice_20_C_23_" style:display-name="Singola riga codice C#" style:family="paragraph" style:parent-style-name="Codice_20_C_23_">
      <style:paragraph-properties fo:margin-top="0.353cm" fo:margin-bottom="0.176cm" loext:contextual-spacing="false"/>
    </style:style>
    <style:style style:name="Codice_20_C_23__20_-_20_singola_20_riga" style:display-name="Codice C# - singola riga" style:family="paragraph" style:parent-style-name="Codice_20_C_23_" style:next-style-name="Corpo_20_del_20_testo_20_no_20_Rientro">
      <style:paragraph-properties fo:margin-top="0.353cm" fo:margin-bottom="0.176cm" loext:contextual-spacing="false"/>
    </style:style>
    <style:style style:name="Stile1" style:family="paragraph" style:parent-style-name="Codice_20_C_23_" style:next-style-name="Codice_20_C_23_">
      <style:paragraph-properties fo:margin-top="0.176cm" fo:margin-bottom="0cm" loext:contextual-spacing="false"/>
    </style:style>
    <style:style style:name="Definizione_20_problema" style:display-name="Definizione problema" style:family="paragraph" style:parent-style-name="Definizione" style:next-style-name="Corpo_20_del_20_testo_20_no_20_Rientro">
      <style:text-properties fo:font-weight="normal" style:font-weight-asian="normal"/>
    </style:style>
    <style:style style:name="Footnote" style:family="paragraph" style:parent-style-name="Standard" style:class="extra">
      <style:paragraph-properties fo:text-align="justify" style:justify-single-word="false"/>
    </style:style>
    <style:style style:name="Codice_20_C_23__20_iniziale" style:display-name="Codice C# iniziale" style:family="paragraph" style:parent-style-name="Codice_20_C_23_" style:next-style-name="Codice_20_C_23_">
      <style:paragraph-properties fo:margin-top="0.176cm" fo:margin-bottom="0cm" loext:contextual-spacing="false"/>
    </style:style>
    <style:style style:name="Corpo_20_testo_20_come_20_elenco_20_no_20_rientro" style:display-name="Corpo testo come elenco no rientro" style:family="paragraph" style:parent-style-name="Corpo_20_del_20_testo_20_no_20_Rientro" style:next-style-name="Corpo_20_testo_20_come_20_elenco">
      <style:paragraph-properties fo:margin-left="1.131cm" fo:margin-right="0cm" fo:text-indent="0cm" style:auto-text-indent="false"/>
    </style:style>
    <style:style style:name="Corpo_20_testo_20_come_20_elenco" style:display-name="Corpo testo come elenco" style:family="paragraph" style:parent-style-name="Text_20_body">
      <style:paragraph-properties fo:margin-left="1.131cm" fo:margin-right="0cm" fo:text-indent="0cm" style:auto-text-indent="false"/>
    </style:style>
    <style:style style:name="definizione_20_formale" style:display-name="definizione formale" style:family="paragraph" style:parent-style-name="Definizione">
      <style:paragraph-properties fo:margin-left="2.501cm" fo:margin-right="1cm" fo:text-indent="-2.501cm" style:auto-text-indent="false"/>
    </style:style>
    <style:style style:name="Intestazione_20_schema_20_o_20_figura" style:display-name="Intestazione schema o figura" style:family="paragraph" style:parent-style-name="Corpo_20_del_20_testo_20_no_20_Rientro" style:next-style-name="Fine_20_schema_20_o_20_figura">
      <style:paragraph-properties fo:margin-top="0.176cm" fo:margin-bottom="0cm" loext:contextual-spacing="false" fo:line-height="100%" fo:padding-left="0cm" fo:padding-right="0cm" fo:padding-top="0.035cm" fo:padding-bottom="0cm" fo:border-left="none" fo:border-right="none" fo:border-top="2.24pt solid #808080" fo:border-bottom="non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Fine_20_schema_20_o_20_figura" style:display-name="Fine schema o figura" style:family="paragraph" style:parent-style-name="Corpo_20_del_20_testo_20_no_20_Rientro" style:next-style-name="Corpo_20_del_20_testo_20_no_20_Rientro">
      <style:paragraph-properties fo:margin-top="0cm" fo:margin-bottom="0.176cm" loext:contextual-spacing="false" fo:line-height="100%" fo:padding-left="0cm" fo:padding-right="0cm" fo:padding-top="0cm" fo:padding-bottom="0.035cm" fo:border-left="none" fo:border-right="none" fo:border-top="none" fo:border-bottom="2.24pt solid #808080"/>
    </style:style>
    <style:style style:name="testo_20_esercizio" style:display-name="testo esercizio" style:family="paragraph" style:parent-style-name="Definizione_20_problema">
      <style:paragraph-properties fo:margin-top="0.635cm" fo:margin-bottom="0.176cm" loext:contextual-spacing="false"/>
    </style:style>
    <style:style style:name="Intestazione_20_tabella" style:display-name="Intestazione tabella" style:family="paragraph" style:parent-style-name="Intestazione_20_schema_20_o_20_figura">
      <style:paragraph-properties fo:margin-top="0.176cm" fo:margin-bottom="0.353cm" loext:contextual-spacing="false"/>
    </style:style>
    <style:style style:name="Fine_20_tabella" style:display-name="Fine tabella" style:family="paragraph" style:parent-style-name="Fine_20_schema_20_o_20_figura">
      <style:paragraph-properties fo:margin-top="0.176cm" fo:margin-bottom="0.176cm" loext:contextual-spacing="false"/>
    </style:style>
    <style:style style:name="Corpo_20_del_20_testo_20_3" style:display-name="Corpo del testo 3" style:family="paragraph" style:parent-style-name="Standard">
      <style:text-properties fo:font-size="8pt" style:font-size-asian="8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fo:font-size="14pt" style:font-size-asian="14pt"/>
    </style:style>
    <style:style style:name="Contents_20_1" style:display-name="Contents 1" style:family="paragraph" style:parent-style-name="Standard" style:next-style-name="Standard" style:class="index">
      <style:paragraph-properties fo:margin-top="0.635cm" fo:margin-bottom="0cm" loext:contextual-spacing="false" fo:text-align="end" style:justify-single-word="false">
        <style:tab-stops>
          <style:tab-stop style:position="16.981cm" style:type="right"/>
        </style:tab-stops>
      </style:paragraph-properties>
      <style:text-properties fo:text-transform="uppercase" style:font-name="Arial" fo:font-family="Arial" style:font-family-generic="swiss" style:font-pitch="variable" fo:font-size="12pt" fo:language="it" fo:country="IT" fo:font-weight="bold" style:font-size-asian="12pt" style:language-asian="it" style:country-asian="I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style>
    <style:style style:name="Contents_20_3" style:display-name="Contents 3" style:family="paragraph" style:parent-style-name="Standard" style:next-style-name="Standard" style:class="index">
      <style:paragraph-properties fo:margin-left="0.353cm" fo:margin-right="0cm" fo:text-indent="0cm" style:auto-text-indent="false"/>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4pt" style:font-size-asian="14pt"/>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0" style:family="text"/>
    <style:style style:name="WW8Num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attere_20_predefinito_20_paragrafo" style:display-name="Carattere predefinito paragrafo" style:family="text"/>
    <style:style style:name="Riferimento_20_a" style:display-name="Riferimento a" style:family="text" style:parent-style-name="Carattere_20_predefinito_20_paragrafo">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Internet_20_link" style:display-name="Internet link" style:family="text" style:parent-style-name="Riferimento_20_a">
      <style:text-properties fo:color="#0000ff" style:text-line-through-style="none" style:text-line-through-type="none" style:text-underline-style="none"/>
    </style:style>
    <style:style style:name="Visited_20_Internet_20_Link" style:display-name="Visited Internet Link" style:family="text" style:parent-style-name="Internet_20_link">
      <style:text-properties fo:color="#800080"/>
    </style:style>
    <style:style style:name="caratteri_20_curier_20_10" style:display-name="caratteri curier 10" style:family="text" style:parent-style-name="Carattere_20_predefinito_20_paragrafo">
      <style:text-properties style:font-name="Courier New" fo:font-family="'Courier New'" style:font-family-generic="modern" fo:font-size="10pt" style:font-size-asian="10pt" style:font-name-complex="Courier New" style:font-family-complex="'Courier New'" style:font-family-generic-complex="modern"/>
    </style:style>
    <style:style style:name="Curier_20_New_20_10" style:display-name="Curier New 10" style:family="text" style:parent-style-name="Carattere_20_predefinito_20_paragrafo">
      <style:text-properties style:font-name="Courier New" fo:font-family="'Courier New'" style:font-family-generic="modern" fo:font-size="10pt" style:font-size-asian="10pt" style:font-name-complex="Courier New" style:font-family-complex="'Courier New'" style:font-family-generic-complex="modern"/>
    </style:style>
    <style:style style:name="Sigle_20_e_20_comandi_20_IDE" style:display-name="Sigle e comandi IDE" style:family="text" style:parent-style-name="Carattere_20_predefinito_20_paragrafo">
      <style:text-properties fo:font-variant="small-cap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Page_20_Number" style:display-name="Page Number"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1.27cm" fo:text-indent="-0.6cm" fo:margin-left="0.6cm"/>
        </style:list-level-properties>
      </text:list-level-style-number>
      <text:list-level-style-number text:level="3" text:style-name="WW8Num13z2" style:num-format="1" text:display-levels="3">
        <style:list-level-properties text:list-level-position-and-space-mode="label-alignment">
          <style:list-level-label-alignment text:label-followed-by="listtab" text:list-tab-stop-position="1.905cm" fo:text-indent="-1cm" fo:margin-left="1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style style:name="MT2" style:family="text"/>
    <style:style style:name="MT3" style:family="text">
      <style:text-properties fo:language="en" fo:country="GB" officeooo:rsid="0003dc8d"/>
    </style:style>
    <style:page-layout style:name="Mpm1" style:page-usage="mirrored">
      <style:page-layout-properties fo:page-width="21.001cm" fo:page-height="29.7cm" style:num-format="1" style:print-orientation="portrait" fo:margin-top="1.27cm" fo:margin-bottom="2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usage="right">
      <style:page-layout-properties fo:page-width="21.001cm" fo:page-height="29.7cm" style:num-format="1" style:print-orientation="portrait" fo:margin-top="1.27cm" fo:margin-bottom="2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header>
        <text:p text:style-name="Header"><text:span text:style-name="Page_20_Number"><text:span text:style-name="MT1">Easy CPU – Quick Reference</text:span></text:span><text:span text:style-name="MT1"><text:tab/><text:tab/></text:span><text:span text:style-name="Page_20_Number"><text:page-number text:select-page="current">0</text:page-number></text:span></text:p>
      </style:header>
      <style:header-first>
        <text:p text:style-name="Header"/>
      </style:header-first>
      <style:header-left>
        <text:p text:style-name="Header"><text:span text:style-name="Page_20_Number"><text:page-number text:select-page="current">2</text:page-number></text:span><text:span text:style-name="Page_20_Number"><text:span text:style-name="MT1"><text:tab/><text:tab/>Easy CPU – Quick Reference</text:span></text:span></text:p>
      </style:header-left>
    </style:master-page>
    <style:master-page style:name="Converti_20_1" style:display-name="Converti 1" style:page-layout-name="Mpm2" style:next-style-name="Converti_20_2">
      <style:header>
        <text:p text:style-name="Header"><text:span text:style-name="Page_20_Number"><text:span text:style-name="MT1">Easy CPU – Quick Reference</text:span></text:span><text:span text:style-name="MT1"><text:tab/><text:tab/></text:span><text:span text:style-name="Page_20_Number"><text:page-number text:select-page="current">0</text:page-number></text:span></text:p>
      </style:header>
      <style:header-first>
        <text:p text:style-name="Header"/>
      </style:header-first>
      <style:header-left>
        <text:p text:style-name="Header"><text:span text:style-name="Page_20_Number"><text:page-number text:select-page="current">0</text:page-number></text:span><text:span text:style-name="Page_20_Number"><text:span text:style-name="MT1"><text:tab/><text:tab/>Easy CPU – Quick Reference</text:span></text:span></text:p>
      </style:header-left>
    </style:master-page>
    <style:master-page style:name="Converti_20_2" style:display-name="Converti 2" style:page-layout-name="Mpm1">
      <style:header>
        <text:p text:style-name="Header"><text:span text:style-name="Page_20_Number"><text:span text:style-name="MT1">Easy CPU – Quick Reference</text:span></text:span><text:span text:style-name="MT1"><text:tab/><text:tab/></text:span><text:span text:style-name="Page_20_Number"><text:page-number text:select-page="current">0</text:page-number></text:span></text:p>
      </style:header>
      <style:header-first>
        <text:p text:style-name="Header"/>
      </style:header-first>
      <style:header-left>
        <text:p text:style-name="Header"><text:span text:style-name="Page_20_Number"><text:page-number text:select-page="current">0</text:page-number></text:span><text:span text:style-name="Page_20_Number"><text:span text:style-name="MT1"><text:tab/><text:tab/>Easy CPU – Quick Reference</text:span></text:span></text:p>
      </style:header-left>
    </style:master-page>
    <style:master-page style:name="Converti_20_3" style:display-name="Converti 3" style:page-layout-name="Mpm2" style:next-style-name="Converti_20_4">
      <style:header>
        <text:p text:style-name="Header"><text:span text:style-name="Page_20_Number"><text:span text:style-name="MT1">Easy CPU – Assembly Reference</text:span></text:span><text:span text:style-name="MT1"><text:tab/><text:tab/></text:span><text:span text:style-name="Page_20_Number"><text:page-number text:select-page="current">5</text:page-number></text:span></text:p>
      </style:header>
      <style:header-first>
        <text:p text:style-name="Header"/>
      </style:header-first>
      <style:header-left>
        <text:p text:style-name="Header"><text:span text:style-name="Page_20_Number"><text:page-number text:select-page="current">0</text:page-number></text:span><text:span text:style-name="Page_20_Number"><text:span text:style-name="MT1"><text:tab/><text:tab/>Easy CPU – Assembly Reference</text:span></text:span></text:p>
      </style:header-left>
    </style:master-page>
    <style:master-page style:name="Converti_20_4" style:display-name="Converti 4" style:page-layout-name="Mpm1">
      <style:header>
        <text:p text:style-name="Header"><text:span text:style-name="Page_20_Number"><text:span text:style-name="MT1">Easy CPU – Assembly </text:span></text:span><text:span text:style-name="Page_20_Number"><text:span text:style-name="MT3">language r</text:span></text:span><text:span text:style-name="Page_20_Number"><text:span text:style-name="MT1">eference</text:span></text:span><text:span text:style-name="MT1"><text:tab/><text:tab/></text:span><text:span text:style-name="Page_20_Number"><text:page-number text:select-page="current">29</text:page-number></text:span></text:p>
      </style:header>
      <style:header-first>
        <text:p text:style-name="Header"/>
      </style:header-first>
      <style:header-left>
        <text:p text:style-name="Header"><text:span text:style-name="Page_20_Number"><text:page-number text:select-page="current">28</text:page-number></text:span><text:span text:style-name="Page_20_Number"><text:span text:style-name="MT1"><text:tab/><text:tab/>Easy CPU – Assembly Reference</text:span></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itolo 2 – Introduzione alle Applicazioni Windows</dc:title>
    <meta:initial-creator>user</meta:initial-creator>
    <meta:creation-date>2005-03-20T18:51:00</meta:creation-date>
    <dc:creator>Paolo Meozzi</dc:creator>
    <dc:date>2015-01-23T22:37:49.076000000</dc:date>
    <meta:print-date>2003-05-02T19:44:00</meta:print-date>
    <meta:editing-cycles>26</meta:editing-cycles>
    <meta:editing-duration>PT1H22M8S</meta:editing-duration>
    <meta:generator>LibreOffice/4.3.1.2$Windows_x86 LibreOffice_project/958349dc3b25111dbca392fbc281a05559ef6848</meta:generator>
    <meta:document-statistic meta:table-count="0" meta:image-count="3" meta:object-count="0" meta:page-count="29" meta:paragraph-count="618" meta:word-count="4007" meta:character-count="24651" meta:non-whitespace-character-count="20857"/>
  </office:meta>
</office:document-meta>
</file>