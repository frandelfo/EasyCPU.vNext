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8000001400B7699AA.png" manifest:media-type="image/png"/>
  <manifest:file-entry manifest:full-path="Pictures/100000000000001000000011CDF0F19D.png" manifest:media-type="image/png"/>
  <manifest:file-entry manifest:full-path="Pictures/10000000000000440000001A2074BEC4.png" manifest:media-type="image/png"/>
  <manifest:file-entry manifest:full-path="Pictures/100000000000006D0000001A24CF0DEC.png" manifest:media-type="image/png"/>
  <manifest:file-entry manifest:full-path="Pictures/10000000000000650000001B24704387.png" manifest:media-type="image/png"/>
  <manifest:file-entry manifest:full-path="Pictures/100000000000001000000012F099FF78.png" manifest:media-type="image/png"/>
  <manifest:file-entry manifest:full-path="Pictures/10000000000001C0000000D09B0D726A.png" manifest:media-type="image/png"/>
  <manifest:file-entry manifest:full-path="Pictures/100000000000001500000013A5307DAF.png" manifest:media-type="image/png"/>
  <manifest:file-entry manifest:full-path="Pictures/100000000000000E0000000D3A8D37A6.png" manifest:media-type="image/png"/>
  <manifest:file-entry manifest:full-path="Pictures/10000000000001B0000000A8D1934071.png" manifest:media-type="image/png"/>
  <manifest:file-entry manifest:full-path="Pictures/100000000000001200000011BD94349F.png" manifest:media-type="image/png"/>
  <manifest:file-entry manifest:full-path="Pictures/100000000000009F0000001AFD1C5804.png" manifest:media-type="image/png"/>
  <manifest:file-entry manifest:full-path="Pictures/10000000000001C20000017CA00EED50.png" manifest:media-type="image/png"/>
  <manifest:file-entry manifest:full-path="Pictures/100000000000000E0000001193335E14.png" manifest:media-type="image/png"/>
  <manifest:file-entry manifest:full-path="Pictures/1000000000000013000000134753CBB4.png" manifest:media-type="image/png"/>
  <manifest:file-entry manifest:full-path="Pictures/10000000000001B0000000B5FC0A573A.png" manifest:media-type="image/png"/>
  <manifest:file-entry manifest:full-path="Pictures/2000000F000069BB0000543C42FDA84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6.097cm" fo:margin-left="0.356cm" table:align="left" style:writing-mode="lr-tb"/>
    </style:style>
    <style:style style:name="Tabella2.A" style:family="table-column">
      <style:table-column-properties style:column-width="4.955cm"/>
    </style:style>
    <style:style style:name="Tabella2.B" style:family="table-column">
      <style:table-column-properties style:column-width="0.432cm"/>
    </style:style>
    <style:style style:name="Tabella2.C" style:family="table-column">
      <style:table-column-properties style:column-width="10.71cm"/>
    </style:style>
    <style:style style:name="Tabella2.1" style:family="table-row">
      <style:table-row-properties style:min-row-height="1.217cm" fo:keep-together="auto"/>
    </style:style>
    <style:style style:name="Tabella2.A1" style:family="table-cell">
      <style:table-cell-properties style:vertical-align="middle" fo:padding-left="0.123cm" fo:padding-right="0.123cm" fo:padding-top="0cm" fo:padding-bottom="0cm" fo:border-left="0.5pt solid #ffffff" fo:border-right="none" fo:border-top="0.5pt solid #000000" fo:border-bottom="0.5pt solid #000000" style:writing-mode="lr-tb"/>
    </style:style>
    <style:style style:name="Tabella2.C1" style:family="table-cell">
      <style:table-cell-properties style:vertical-align="middle" fo:padding-left="0.123cm" fo:padding-right="0.123cm" fo:padding-top="0cm" fo:padding-bottom="0cm" fo:border-left="0.5pt solid #000000" fo:border-right="0.5pt solid #ffffff" fo:border-top="0.5pt solid #000000" fo:border-bottom="0.5pt solid #000000" style:writing-mode="lr-tb"/>
    </style:style>
    <style:style style:name="P1" style:family="paragraph" style:parent-style-name="Heading_20_2" style:list-style-name="" style:master-page-name="Converti_20_3">
      <style:paragraph-properties fo:margin-left="0cm" fo:margin-right="0cm" fo:margin-top="0cm" fo:margin-bottom="0.349cm" loext:contextual-spacing="false" fo:text-indent="0cm" style:auto-text-indent="false" style:page-number="auto"/>
    </style:style>
    <style:style style:name="P2" style:family="paragraph" style:parent-style-name="Caption">
      <style:paragraph-properties fo:text-align="center" style:justify-single-word="false"/>
    </style:style>
    <style:style style:name="P3" style:family="paragraph" style:parent-style-name="Standard">
      <style:text-properties fo:color="#000000"/>
    </style:style>
    <style:style style:name="P4" style:family="paragraph" style:parent-style-name="Heading_20_8" style:master-page-name="Converti_20_1">
      <style:paragraph-properties style:page-number="auto"/>
    </style:style>
    <style:style style:name="P5" style:family="paragraph" style:parent-style-name="Codice_20_C_23_">
      <style:text-properties fo:language="en" fo:country="GB"/>
    </style:style>
    <style:style style:name="P6" style:family="paragraph" style:parent-style-name="Corpo_20_del_20_testo_20_no_20_Rientro">
      <style:text-properties officeooo:paragraph-rsid="001438bc"/>
    </style:style>
    <style:style style:name="P7" style:family="paragraph" style:parent-style-name="Corpo_20_del_20_testo_20_no_20_Rientro">
      <style:text-properties officeooo:paragraph-rsid="00147ce6"/>
    </style:style>
    <style:style style:name="P8" style:family="paragraph" style:parent-style-name="Elenco_20_Quadrato">
      <style:text-properties fo:language="en" fo:country="GB"/>
    </style:style>
    <style:style style:name="P9" style:family="paragraph" style:parent-style-name="SottoTitolo_20_2">
      <style:paragraph-properties fo:margin-left="0cm" fo:margin-right="0cm" fo:margin-top="0cm" fo:margin-bottom="0.106cm" loext:contextual-spacing="false" fo:text-indent="0cm" style:auto-text-indent="false"/>
      <style:text-properties fo:font-size="10pt" style:font-size-asian="10pt"/>
    </style:style>
    <style:style style:name="P10" style:family="paragraph" style:parent-style-name="SottoTitolo_20_2">
      <style:paragraph-properties fo:margin-left="1cm" fo:margin-right="0cm" fo:margin-top="0cm" fo:margin-bottom="0.106cm" loext:contextual-spacing="false" fo:text-indent="0cm" style:auto-text-indent="false"/>
      <style:text-properties fo:font-size="10pt" style:font-size-asian="10pt"/>
    </style:style>
    <style:style style:name="P11" style:family="paragraph" style:parent-style-name="SottoTitolo_20_1">
      <style:paragraph-properties fo:text-align="end" style:justify-single-word="false"/>
      <style:text-properties style:font-name="Arial Black" fo:font-size="30pt" fo:text-shadow="1pt 1pt" style:font-size-asian="30pt" style:font-name-complex="Arial Black"/>
    </style:style>
    <style:style style:name="P12" style:family="paragraph" style:parent-style-name="SottoTitolo_20_1" style:master-page-name="Standard">
      <style:paragraph-properties fo:text-align="end" style:justify-single-word="false" style:page-number="auto"/>
      <style:text-properties style:font-name="Arial Black" fo:font-size="44pt" fo:text-shadow="1pt 1pt" style:font-size-asian="44pt" style:font-name-complex="Arial Black"/>
    </style:style>
    <style:style style:name="P13" style:family="paragraph" style:parent-style-name="Riquadro_20_grigio">
      <style:text-properties fo:language="it" fo:country="IT"/>
    </style:style>
    <style:style style:name="P14" style:family="paragraph" style:parent-style-name="Contents_20_2">
      <style:paragraph-properties>
        <style:tab-stops>
          <style:tab-stop style:position="16.983cm" style:type="right"/>
        </style:tab-stops>
      </style:paragraph-properties>
    </style:style>
    <style:style style:name="P15" style:family="paragraph" style:parent-style-name="Contents_20_2">
      <style:paragraph-properties>
        <style:tab-stops>
          <style:tab-stop style:position="1.27cm"/>
          <style:tab-stop style:position="16.983cm" style:type="right"/>
        </style:tab-stops>
      </style:paragraph-properties>
    </style:style>
    <style:style style:name="P16" style:family="paragraph" style:parent-style-name="Contents_20_3">
      <style:paragraph-properties>
        <style:tab-stops>
          <style:tab-stop style:position="16.983cm" style:type="right"/>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147ce6"/>
    </style:style>
    <style:style style:name="P20" style:family="paragraph" style:parent-style-name="Text_20_body">
      <style:paragraph-properties fo:margin-left="0cm" fo:margin-right="0cm" fo:text-align="center" style:justify-single-word="false" fo:text-indent="0cm" style:auto-text-indent="false"/>
    </style:style>
    <style:style style:name="P21" style:family="paragraph" style:parent-style-name="Text_20_body">
      <style:paragraph-properties fo:margin-left="0cm" fo:margin-right="0cm" fo:text-align="start" style:justify-single-word="false"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snap-to-layout-grid="false"/>
    </style:style>
    <style:style style:name="P23" style:family="paragraph" style:parent-style-name="Text_20_body">
      <style:paragraph-properties fo:margin-left="0cm" fo:margin-right="0cm" fo:text-align="start" style:justify-single-word="false" fo:text-indent="0cm" style:auto-text-indent="false" style:snap-to-layout-grid="false"/>
      <style:text-properties style:font-name="Verdana" fo:font-size="10pt" style:font-size-asian="10pt" style:font-name-complex="Verdana"/>
    </style:style>
    <style:style style:name="P24" style:family="paragraph" style:parent-style-name="Text_20_body">
      <style:paragraph-properties fo:margin-left="0.134cm" fo:margin-right="0cm" fo:text-align="start" style:justify-single-word="false" fo:text-indent="0cm" style:auto-text-indent="false"/>
      <style:text-properties style:font-name="Verdana" fo:font-size="10pt" style:font-size-asian="10pt" style:font-name-complex="Verdana"/>
    </style:style>
    <style:style style:name="P25" style:family="paragraph" style:parent-style-name="Text_20_body">
      <style:paragraph-properties fo:margin-left="0.557cm" fo:margin-right="0cm" fo:text-align="start" style:justify-single-word="false" fo:text-indent="0cm" style:auto-text-indent="false" style:snap-to-layout-grid="false"/>
      <style:text-properties style:font-name="Verdana" fo:font-size="10pt" style:font-size-asian="10pt" style:font-name-complex="Verdana"/>
    </style:style>
    <style:style style:name="T1" style:family="text">
      <style:text-properties fo:font-weight="bold" style:font-weight-asian="bold" style:font-weight-complex="bold"/>
    </style:style>
    <style:style style:name="T2" style:family="text">
      <style:text-properties fo:font-size="10pt" style:font-size-asian="10pt"/>
    </style:style>
    <style:style style:name="T3" style:family="text">
      <style:text-properties fo:color="#000000"/>
    </style:style>
    <style:style style:name="T4" style:family="text">
      <style:text-properties fo:language="it" fo:country="IT" style:language-asian="it" style:country-asian="IT"/>
    </style:style>
    <style:style style:name="T5" style:family="text">
      <style:text-properties fo:language="it" fo:country="IT" style:language-asian="it" style:country-asian="IT" style:font-size-complex="14pt"/>
    </style:style>
    <style:style style:name="T6" style:family="text">
      <style:text-properties fo:language="it" fo:country="IT" fo:font-weight="normal" style:language-asian="it" style:country-asian="IT" style:font-weight-asian="normal" style:font-size-complex="12pt" style:font-weight-complex="normal"/>
    </style:style>
    <style:style style:name="T7" style:family="text">
      <style:text-properties fo:language="en" fo:country="GB"/>
    </style:style>
    <style:style style:name="T8" style:family="text">
      <style:text-properties fo:language="en" fo:country="GB" style:language-asian="it" style:country-asian="IT"/>
    </style:style>
    <style:style style:name="T9" style:family="text">
      <style:text-properties style:font-name-asian="Arial"/>
    </style:style>
    <style:style style:name="T10" style:family="text">
      <style:text-properties officeooo:rsid="001438bc"/>
    </style:style>
    <style:style style:name="T11" style:family="text">
      <style:text-properties officeooo:rsid="00147ce6"/>
    </style:style>
    <style:style style:name="T12" style:family="text">
      <style:text-properties fo:font-style="italic" style:font-style-asian="italic" style:font-style-complex="italic"/>
    </style:style>
    <style:style style:name="T13" style:family="text">
      <style:text-properties fo:font-size="9pt" style:font-size-asian="7.84999990463257pt" style:font-size-complex="9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EasyCPU </text:p>
      <text:p text:style-name="P11">IDE Tutorial</text:p>
      <text:p text:style-name="Corpo_20_del_20_testo_20_no_20_Rientro"/>
      <text:p text:style-name="Text_20_body"/>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4">Sommario</text:p>
      <text:table-of-content text:style-name="Sect1" text:name="Indice generale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index-source-styles text:outline-level="1">
            <text:index-source-style text:style-name="Heading_20_1"/>
            <text:index-source-style text:style-name="Titolo1Appendice"/>
          </text:index-source-styles>
          <text:index-source-styles text:outline-level="2">
            <text:index-source-style text:style-name="Addressee"/>
            <text:index-source-style text:style-name="Titolo_20_2_20_Inverso"/>
          </text:index-source-styles>
        </text:table-of-content-source>
        <text:index-body>
          <text:p text:style-name="P14"><text:span text:style-name="T5">Introduzione</text:span><text:span text:style-name="T4"><text:tab/></text:span><text:a xlink:type="simple" xlink:href="#__RefHeading___Toc98492050" text:style-name="Index_20_Link_20__28_user_29_" text:visited-style-name="Index_20_Link_20__28_user_29_"><text:span text:style-name="T4">5</text:span></text:a></text:p>
          <text:p text:style-name="P15"><text:span text:style-name="T5">1</text:span><text:span text:style-name="T6"><text:tab/></text:span><text:span text:style-name="T5">Cenni generali sull’IDE</text:span><text:span text:style-name="T4"><text:tab/></text:span><text:a xlink:type="simple" xlink:href="#__RefHeading___Toc98492051" text:style-name="Index_20_Link_20__28_user_29_" text:visited-style-name="Index_20_Link_20__28_user_29_"><text:span text:style-name="T4">5</text:span></text:a></text:p>
          <text:p text:style-name="P16"><text:span text:style-name="T4">1.1 Area «codice e dati»<text:tab/></text:span><text:a xlink:type="simple" xlink:href="#__RefHeading___Toc98492052" text:style-name="Index_20_Link_20__28_user_29_" text:visited-style-name="Index_20_Link_20__28_user_29_"><text:span text:style-name="T4">5</text:span></text:a></text:p>
          <text:p text:style-name="P16"><text:span text:style-name="T4">1.2 Area «memoria» ed «errori di compilazione»<text:tab/></text:span><text:a xlink:type="simple" xlink:href="#__RefHeading___Toc98492053" text:style-name="Index_20_Link_20__28_user_29_" text:visited-style-name="Index_20_Link_20__28_user_29_"><text:span text:style-name="T4">5</text:span></text:a></text:p>
          <text:p text:style-name="P16"><text:span text:style-name="T8">1.3 Area «stack»<text:tab/></text:span><text:a xlink:type="simple" xlink:href="#__RefHeading___Toc98492054" text:style-name="Index_20_Link_20__28_user_29_" text:visited-style-name="Index_20_Link_20__28_user_29_"><text:span text:style-name="T8">6</text:span></text:a></text:p>
          <text:p text:style-name="P16"><text:span text:style-name="T8">1.4 Area «registri»<text:tab/></text:span><text:a xlink:type="simple" xlink:href="#__RefHeading___Toc98492055" text:style-name="Index_20_Link_20__28_user_29_" text:visited-style-name="Index_20_Link_20__28_user_29_"><text:span text:style-name="T8">6</text:span></text:a></text:p>
          <text:p text:style-name="P16"><text:span text:style-name="T4">1.5 Toolbar<text:tab/></text:span><text:a xlink:type="simple" xlink:href="#__RefHeading___Toc98492056" text:style-name="Index_20_Link_20__28_user_29_" text:visited-style-name="Index_20_Link_20__28_user_29_"><text:span text:style-name="T4">6</text:span></text:a></text:p>
          <text:p text:style-name="P16"><text:span text:style-name="T4">1.6 Barra di stato<text:tab/></text:span><text:a xlink:type="simple" xlink:href="#__RefHeading___Toc98492057" text:style-name="Index_20_Link_20__28_user_29_" text:visited-style-name="Index_20_Link_20__28_user_29_"><text:span text:style-name="T4">6</text:span></text:a></text:p>
          <text:p text:style-name="P15"><text:span text:style-name="T5">2</text:span><text:span text:style-name="T6"><text:tab/></text:span><text:span text:style-name="T5">Scrittura, esecuzione e debug di un programma assembly</text:span><text:span text:style-name="T4"><text:tab/></text:span><text:a xlink:type="simple" xlink:href="#__RefHeading___Toc98492058" text:style-name="Index_20_Link_20__28_user_29_" text:visited-style-name="Index_20_Link_20__28_user_29_"><text:span text:style-name="T4">7</text:span></text:a></text:p>
          <text:p text:style-name="P16"><text:span text:style-name="T4">2.1 Struttura di un programma assembly<text:tab/></text:span><text:a xlink:type="simple" xlink:href="#__RefHeading___Toc98492059" text:style-name="Index_20_Link_20__28_user_29_" text:visited-style-name="Index_20_Link_20__28_user_29_"><text:span text:style-name="T4">7</text:span></text:a></text:p>
          <text:p text:style-name="P16"><text:span text:style-name="T4">2.2 Gestione programmi: menu «File»<text:tab/></text:span><text:a xlink:type="simple" xlink:href="#__RefHeading___Toc98492060" text:style-name="Index_20_Link_20__28_user_29_" text:visited-style-name="Index_20_Link_20__28_user_29_"><text:span text:style-name="T4">7</text:span></text:a></text:p>
          <text:p text:style-name="P16"><text:span text:style-name="T4">2.3 Editor di codice e dati<text:tab/></text:span><text:a xlink:type="simple" xlink:href="#__RefHeading___Toc98492061" text:style-name="Index_20_Link_20__28_user_29_" text:visited-style-name="Index_20_Link_20__28_user_29_"><text:span text:style-name="T4">7</text:span></text:a></text:p>
          <text:p text:style-name="P16"><text:span text:style-name="T4">2.4 Compilazione ed esecuzione di un programma<text:tab/></text:span><text:a xlink:type="simple" xlink:href="#__RefHeading___Toc98492062" text:style-name="Index_20_Link_20__28_user_29_" text:visited-style-name="Index_20_Link_20__28_user_29_"><text:span text:style-name="T4">7</text:span></text:a></text:p>
          <text:p text:style-name="P16"><text:span text:style-name="T4">2.5 Visualizzazione degli errori compilazione<text:tab/></text:span><text:a xlink:type="simple" xlink:href="#__RefHeading___Toc98492063" text:style-name="Index_20_Link_20__28_user_29_" text:visited-style-name="Index_20_Link_20__28_user_29_"><text:span text:style-name="T4">8</text:span></text:a></text:p>
          <text:p text:style-name="P16"><text:span text:style-name="T4">2.6 Debug di un programma (esecuzione “passo passo”)<text:tab/></text:span><text:a xlink:type="simple" xlink:href="#__RefHeading___Toc98492064" text:style-name="Index_20_Link_20__28_user_29_" text:visited-style-name="Index_20_Link_20__28_user_29_"><text:span text:style-name="T4">8</text:span></text:a></text:p>
          <text:p text:style-name="P16"><text:span text:style-name="T4">2.7 Continuare o arrestare l’esecuzione di un programma in modalità debug<text:tab/></text:span><text:a xlink:type="simple" xlink:href="#__RefHeading___Toc98492065" text:style-name="Index_20_Link_20__28_user_29_" text:visited-style-name="Index_20_Link_20__28_user_29_"><text:span text:style-name="T4">10</text:span></text:a></text:p>
          <text:p text:style-name="P16"><text:span text:style-name="T4">2.8 Interrompere un ciclo infinito<text:tab/></text:span><text:a xlink:type="simple" xlink:href="#__RefHeading___Toc98492066" text:style-name="Index_20_Link_20__28_user_29_" text:visited-style-name="Index_20_Link_20__28_user_29_"><text:span text:style-name="T4">10</text:span></text:a></text:p>
          <text:p text:style-name="P16"><text:span text:style-name="T4">2.9 Stato della CPU<text:tab/></text:span><text:a xlink:type="simple" xlink:href="#__RefHeading___Toc98492067" text:style-name="Index_20_Link_20__28_user_29_" text:visited-style-name="Index_20_Link_20__28_user_29_"><text:span text:style-name="T4">11</text:span></text:a></text:p>
          <text:p text:style-name="P15"><text:span text:style-name="T5">3</text:span><text:span text:style-name="T6"><text:tab/></text:span><text:span text:style-name="T5">Preferenze e opzioni di visualizzazione</text:span><text:span text:style-name="T4"><text:tab/></text:span><text:a xlink:type="simple" xlink:href="#__RefHeading___Toc98492068" text:style-name="Index_20_Link_20__28_user_29_" text:visited-style-name="Index_20_Link_20__28_user_29_"><text:span text:style-name="T4">11</text:span></text:a></text:p>
        </text:index-body>
      </text:table-of-content>
      <text:p text:style-name="P3"/>
      <text:p text:style-name="P3"/>
      <text:h text:style-name="P1" text:outline-level="2"><text:bookmark-start text:name="__RefHeading___Toc98492050"/>Introduzione<text:bookmark-end text:name="__RefHeading___Toc98492050"/></text:h>
      <text:p text:style-name="P6">EasyCPU è un ambiente di programmazione realizzato per l’insegnamento del linguaggio assembly <text:span text:style-name="T10">X86</text:span>. Consente di scrivere, eseguire e debuggare programmi, ma non è un assemblatore, non produce cioè codice macchina nativo per una determinata piattaforma. </text:p>
      <text:p text:style-name="P6">EasyCPU implementa una CPU virtuale con un set di istruzioni e una gestione dei registri e della memoria estremamente semplificati rispetto a quelli supportati dai microprocessore reali. </text:p>
      <text:list xml:id="list7857445130247090339" text:style-name="WW8Num10">
        <text:list-item>
          <text:list>
            <text:list-item>
              <text:h text:style-name="Heading_20_2" text:outline-level="2"><text:bookmark-start text:name="__RefHeading___Toc98492051"/>Cenni generali sull’IDE<text:bookmark-end text:name="__RefHeading___Toc98492051"/></text:h>
            </text:list-item>
          </text:list>
        </text:list-item>
      </text:list>
      <text:p text:style-name="Corpo_20_del_20_testo_20_no_20_Rientro"><text:span text:style-name="T10">L'IDE di </text:span>EasyCPU fornisce le funzionalità necessarie per scrivere, eseguire e testare un programma in linguaggio assembly. La figura a pagina successiva mostra uno screenshot, il quale è suddiviso in quattro aree principali:</text:p>
      <text:list xml:id="list165010174784353830" text:style-name="WW8Num13">
        <text:list-item>
          <text:p text:style-name="Elenco_20_Quadrato">area «codice e dati»</text:p>
        </text:list-item>
        <text:list-item>
          <text:p text:style-name="Elenco_20_Quadrato">area «memoria» ed «errori di compilazione»</text:p>
        </text:list-item>
        <text:list-item>
          <text:p text:style-name="P8">area «stack»</text:p>
        </text:list-item>
        <text:list-item>
          <text:p text:style-name="Elenco_20_Quadrato">area «registri»</text:p>
        </text:list-item>
      </text:list>
      <text:list xml:id="list223634402173487" text:continue-list="list7857445130247090339" text:style-name="WW8Num10">
        <text:list-item>
          <text:list>
            <text:list-item>
              <text:list>
                <text:list-item>
                  <text:h text:style-name="Heading_20_3" text:outline-level="3"><text:bookmark-start text:name="__RefHeading___Toc98492052"/>Area «codice e dati»<text:bookmark-end text:name="__RefHeading___Toc98492052"/></text:h>
                </text:list-item>
              </text:list>
            </text:list-item>
          </text:list>
        </text:list-item>
      </text:list>
      <text:p text:style-name="Corpo_20_del_20_testo_20_no_20_Rientro">Questa rappresenta l’editor del programma, sia per quanto riguarda l<text:span text:style-name="T10">e istruzioni </text:span>(scheda «codice») che <text:span text:style-name="T10">i dati </text:span>costanti da collocare nella memoria della CPU (scheda «dati»). Durante l’esecuzione di un programma, entrambi gli editor sono disabilitati.</text:p>
      <text:list xml:id="list223634402182306" text:continue-numbering="true" text:style-name="WW8Num10">
        <text:list-item>
          <text:list>
            <text:list-item>
              <text:list>
                <text:list-item>
                  <text:h text:style-name="Heading_20_3" text:outline-level="3"><text:bookmark-start text:name="__RefHeading___Toc98492053"/>Area «memoria» ed «errori di compilazione»<text:bookmark-end text:name="__RefHeading___Toc98492053"/></text:h>
                </text:list-item>
              </text:list>
            </text:list-item>
          </text:list>
        </text:list-item>
      </text:list>
      <text:p text:style-name="Corpo_20_del_20_testo_20_no_20_Rientro">Quest’area rappresenta una finestra sul contenuto della memoria della CPU, esclusa la zona dedicata allo stack. Esistono tre modalità di visualizzazione: decimale, esadecimale e carattere. L’utente può decidere se visualizzare o nascondere quest’area. </text:p>
      <text:p text:style-name="Text_20_body">In caso di errori di compilazione del programma, l’area di memoria viene nascosta e viene mostrato l’elenco degli errori di sintassi. Cliccando su un errore il <text:span text:style-name="T11">cursore</text:span> dell’editor viene posizionato automaticamente sulla posizione corrispondente nel programma.</text:p>
      <text:list xml:id="list223634402172639" text:continue-numbering="true" text:style-name="WW8Num10">
        <text:list-item>
          <text:list>
            <text:list-item>
              <text:list>
                <text:list-item>
                  <text:h text:style-name="Heading_20_3" text:outline-level="3"><text:bookmark-start text:name="__RefHeading___Toc98492054"/>Area «stack»<text:bookmark-end text:name="__RefHeading___Toc98492054"/></text:h>
                </text:list-item>
              </text:list>
            </text:list-item>
          </text:list>
        </text:list-item>
      </text:list>
      <text:p text:style-name="P7">Rappresenta una finestra sull’area di memoria riservata allo stack. Anche in questo caso esistono tre modalità di visualizzazione: decimale, esadecimale e carattere. </text:p>
      <text:p text:style-name="P7"><text:span text:style-name="T11">È </text:span>possibile stabilire se visualizzare le celle di memoria in una o due colonne.</text:p>
      <text:list xml:id="list223634402177815" text:continue-numbering="true" text:style-name="WW8Num10">
        <text:list-item>
          <text:list>
            <text:list-item>
              <text:list>
                <text:list-item>
                  <text:h text:style-name="Heading_20_3" text:outline-level="3"><text:bookmark-start text:name="__RefHeading___Toc98492055"/>Area «registri»<text:bookmark-end text:name="__RefHeading___Toc98492055"/></text:h>
                </text:list-item>
              </text:list>
            </text:list-item>
          </text:list>
        </text:list-item>
      </text:list>
      <text:p text:style-name="Corpo_20_del_20_testo_20_no_20_Rientro">Visualizza il contenuto dei registri, in formato decimale o esadecimale. I flag vengono visualizzati separatamente, in verde-minuscolo se valgono zero, in rosso-maiuscolo se valgono 1. </text:p>
      <text:list xml:id="list223634402170519" text:continue-numbering="true" text:style-name="WW8Num10">
        <text:list-item>
          <text:list>
            <text:list-item>
              <text:list>
                <text:list-item>
                  <text:h text:style-name="Heading_20_3" text:outline-level="3"><text:bookmark-start text:name="__RefHeading___Toc98492056"/><text:soft-page-break/>Toolbar<text:bookmark-end text:name="__RefHeading___Toc98492056"/></text:h>
                </text:list-item>
              </text:list>
            </text:list-item>
          </text:list>
        </text:list-item>
      </text:list>
      <text:p text:style-name="Corpo_20_del_20_testo_20_no_20_Rientro">Rende disponibili i comandi più comuni di EasyCPU. Questi sono suddivisi in tre categorie: gestione file, esecuzione e opzioni di visualizzazione.</text:p>
      <text:list xml:id="list223634402177233" text:continue-numbering="true" text:style-name="WW8Num10">
        <text:list-item>
          <text:list>
            <text:list-item>
              <text:list>
                <text:list-item>
                  <text:h text:style-name="Heading_20_3" text:outline-level="3"><text:bookmark-start text:name="__RefHeading___Toc98492057"/>Barra di stato<text:bookmark-end text:name="__RefHeading___Toc98492057"/></text:h>
                </text:list-item>
              </text:list>
            </text:list-item>
          </text:list>
        </text:list-item>
      </text:list>
      <text:p text:style-name="Corpo_20_del_20_testo_20_no_20_Rientro">La barra di stato mostra lo stato di esecuzione del programma, la riga corrente dell’editor ed il valore del registro selezionato nella area «registri».</text:p>
      <text:p text:style-name="P2"><draw:frame draw:style-name="fr1" draw:name="Immagine2" text:anchor-type="as-char" svg:width="15.452cm" svg:height="12.301cm" draw:z-index="0"><draw:image xlink:href="Pictures/2000000F000069BB0000543C42FDA84B.wmf" xlink:type="simple" xlink:show="embed" xlink:actuate="onLoad"/></draw:frame></text:p>
      <text:p text:style-name="Caption"><text:span text:style-name="T2">Figura </text:span><text:span text:style-name="T2"><text:sequence text:ref-name="refFigura0" text:name="Figura" text:formula="ooow:Figura+1" style:num-format="1">1</text:sequence></text:span><text:span text:style-name="T2"> IDE di EasyCPU.</text:span></text:p>
      <text:list xml:id="list223634449157671" text:continue-numbering="true" text:style-name="WW8Num10">
        <text:list-item>
          <text:list>
            <text:list-item>
              <text:h text:style-name="Heading_20_2" text:outline-level="2"><text:bookmark-start text:name="__RefHeading___Toc98492058"/>Scrittura, esecuzione e debug di un programma assembly<text:bookmark-end text:name="__RefHeading___Toc98492058"/></text:h>
            </text:list-item>
          </text:list>
        </text:list-item>
      </text:list>
      <text:p text:style-name="Corpo_20_del_20_testo_20_no_20_Rientro">Un programma è rappresentato da un normale file di testo con estensione predefinita <text:span text:style-name="T1">as</text:span>. <text:span text:style-name="T11">U</text:span>n programma non può interagire con l’utente, ma è in grado soltanto di eseguire operazioni sui registri e sulla memoria della CPU.</text:p>
      <text:list xml:id="list223634449169225" text:continue-numbering="true" text:style-name="WW8Num10">
        <text:list-item>
          <text:list>
            <text:list-item>
              <text:list>
                <text:list-item>
                  <text:h text:style-name="Heading_20_3" text:outline-level="3"><text:bookmark-start text:name="__RefHeading___Toc98492059"/>Struttura di un programma assembly<text:bookmark-end text:name="__RefHeading___Toc98492059"/></text:h>
                </text:list-item>
              </text:list>
            </text:list-item>
          </text:list>
        </text:list-item>
      </text:list>
      <text:p text:style-name="Corpo_20_del_20_testo_20_no_20_Rientro">Un programma è suddiviso nelle sezioni «codice» e «dati». La parte codice contiene le istruzioni in linguaggio assembly e comincia con l’inizio del file. La parte dati, opzionale, è separata dalla parte codice dalla direttiva «.DATA». Segue un breve esempio:</text:p>
      <text:p text:style-name="Text_20_body"/>
      <text:p text:style-name="Codice_20_C_23__20_iniziale"><text:soft-page-break/>// Esempio di programma in linguaggio assembly: somma di due numeri</text:p>
      <text:p text:style-name="Codice_20_C_23_">// i valori da sommare sono memorizzati agli indirizzi di memoria 1 e 2</text:p>
      <text:p text:style-name="Codice_20_C_23_"><text:tab/><text:tab/>mov ax, [1]<text:tab/>// carica in ax il primo valore da sommare</text:p>
      <text:p text:style-name="Codice_20_C_23_"><text:tab/><text:tab/>mov bx, [2] <text:tab/>// carica in ax il primo valore da sommare</text:p>
      <text:p text:style-name="Codice_20_C_23_"><text:tab/><text:tab/><text:span text:style-name="T7">add ax, bx</text:span></text:p>
      <text:p text:style-name="P5">// -------------------------------------</text:p>
      <text:p text:style-name="Codice_20_C_23_">.DATA</text:p>
      <text:p text:style-name="Codice_20_C_23_">1: 5</text:p>
      <text:p text:style-name="Codice_20_C_23_">2: 22</text:p>
      <text:p text:style-name="Corpo_20_del_20_testo_20_no_20_Rientro">Come si vede, un programma può contenere dei commenti, prefissati dal simbolo “//”.</text:p>
      <text:list xml:id="list223634449166372" text:continue-numbering="true" text:style-name="WW8Num10">
        <text:list-item>
          <text:list>
            <text:list-item>
              <text:list>
                <text:list-item>
                  <text:h text:style-name="Heading_20_3" text:outline-level="3"><text:bookmark-start text:name="__RefHeading___Toc98492060"/>Gestione programmi: menu «File»<text:bookmark-end text:name="__RefHeading___Toc98492060"/></text:h>
                </text:list-item>
              </text:list>
            </text:list-item>
          </text:list>
        </text:list-item>
      </text:list>
      <text:p text:style-name="Corpo_20_del_20_testo_20_no_20_Rientro"><text:span text:style-name="T11">M</text:span>ediante i comandi del menù «File» ed i pulsanti della tool bar è possibile creare un nuovo programma, aprirne uno esistente e salvare il programma in fase di editing. Il menù «File» definisce inoltre l’elenco dei quattro programmi più recenti caricati nell’IDE.</text:p>
      <text:list xml:id="list223634449162489" text:continue-numbering="true" text:style-name="WW8Num10">
        <text:list-item>
          <text:list>
            <text:list-item>
              <text:list>
                <text:list-item>
                  <text:h text:style-name="Heading_20_3" text:outline-level="3"><text:bookmark-start text:name="__RefHeading___Toc98492061"/>Editor di codice e dati<text:bookmark-end text:name="__RefHeading___Toc98492061"/></text:h>
                </text:list-item>
              </text:list>
            </text:list-item>
          </text:list>
        </text:list-item>
      </text:list>
      <text:p text:style-name="Corpo_20_del_20_testo_20_no_20_Rientro">Pur essendo memorizzati nello stesso file, le sezioni «codice» e «dati» di un programma sono gesti<text:span text:style-name="T11">t</text:span>e da editor separati. Per entrambi è possibile stabilire il font utilizzato mediante il comando «Preferenze | Font codice e dati…». </text:p>
      <text:p text:style-name="Text_20_body">L’editor di codice consente inoltre di stabilire il numero di spazi da inserire automaticamente dal margine sinistro.</text:p>
      <text:list xml:id="list223634449175480" text:continue-numbering="true" text:style-name="WW8Num10">
        <text:list-item>
          <text:list>
            <text:list-item>
              <text:list>
                <text:list-item>
                  <text:h text:style-name="Heading_20_3" text:outline-level="3"><text:bookmark-start text:name="__RefHeading___Toc98492062"/>Compilazione ed esecuzione di un programma<text:bookmark-end text:name="__RefHeading___Toc98492062"/></text:h>
                </text:list-item>
              </text:list>
            </text:list-item>
          </text:list>
        </text:list-item>
      </text:list>
      <text:p text:style-name="Corpo_20_del_20_testo_20_no_20_Rientro">Un programma può essere eseguito in tre modi:</text:p>
      <text:list xml:id="list223634449158515" text:continue-list="list165010174784353830" text:style-name="WW8Num13">
        <text:list-item>
          <text:p text:style-name="Elenco_20_Quadrato">con il comando «Esegui | Esegui»;</text:p>
        </text:list-item>
        <text:list-item>
          <text:p text:style-name="Elenco_20_Quadrato">con il tasto F5;</text:p>
        </text:list-item>
        <text:list-item>
          <text:p text:style-name="Elenco_20_Quadrato">c<text:span text:style-name="T11">l</text:span>iccando sul bottone <draw:frame draw:style-name="fr1" draw:name="Immagine3" text:anchor-type="as-char" svg:width="0.37cm" svg:height="0.45cm" draw:z-index="1"><draw:image xlink:href="Pictures/100000000000000E0000001193335E14.png" xlink:type="simple" xlink:show="embed" xlink:actuate="onLoad"/></draw:frame>.</text:p>
        </text:list-item>
      </text:list>
      <text:p text:style-name="Corpo_20_del_20_testo_20_no_20_Rientro"><text:span text:style-name="T11">L</text:span>’esecuzione procede fino al termine del programma, a meno che non venga identificato un potenziale ciclo infinito (vedi «Interruzione di un ciclo infinito»).</text:p>
      <text:list xml:id="list223634449179981" text:continue-list="list223634449175480" text:style-name="WW8Num10">
        <text:list-item>
          <text:list>
            <text:list-item>
              <text:list>
                <text:list-item>
                  <text:h text:style-name="Heading_20_3" text:outline-level="3"><text:bookmark-start text:name="__RefHeading___Toc98492063"/>Visualizzazione degli errori compilazione<text:bookmark-end text:name="__RefHeading___Toc98492063"/></text:h>
                </text:list-item>
              </text:list>
            </text:list-item>
          </text:list>
        </text:list-item>
      </text:list>
      <text:p text:style-name="Corpo_20_del_20_testo_20_no_20_Rientro">L’esecuzione di un programma viene preceduta dalla verifica sintattica del codice. Gli eventuali errori vengono mostrati nell’area «errori di compilazione», la quale nasconde automaticamente l’area «memoria». </text:p>
      <text:p text:style-name="P19">La figura seguente mostra un frammento di programma contenente due errori; per ogni errore viene riportato se è relativo al codice o ai dati, <text:s/>il numero di riga e un messaggio informativo. </text:p>
      <text:p text:style-name="P19"><text:soft-page-break/>Cliccando sul report di un errore, il <text:span text:style-name="T11">cursore</text:span> viene automaticamente portato sulla posizione corrispondente nel codice sorgente.</text:p>
      <text:p text:style-name="P20"><draw:frame draw:style-name="fr1" draw:name="Immagine4" text:anchor-type="as-char" svg:width="11.904cm" svg:height="10.052cm" draw:z-index="2"><draw:image xlink:href="Pictures/10000000000001C20000017CA00EED50.png" xlink:type="simple" xlink:show="embed" xlink:actuate="onLoad"/></draw:frame></text:p>
      <text:p text:style-name="P13">In alcuni casi sia il messaggio visualizzato che il posizionamento del <text:span text:style-name="T11">cursore</text:span> possono essere fuorvianti. </text:p>
      <text:list xml:id="list223634480176012" text:continue-numbering="true" text:style-name="WW8Num10">
        <text:list-item>
          <text:list>
            <text:list-item>
              <text:list>
                <text:list-item>
                  <text:h text:style-name="Heading_20_3" text:outline-level="3"><text:span text:style-name="T9"><text:s/></text:span><text:bookmark-start text:name="__RefHeading___Toc98492064"/>Debug di un programma (esecuzione “passo passo”)<text:bookmark-end text:name="__RefHeading___Toc98492064"/></text:h>
                </text:list-item>
              </text:list>
            </text:list-item>
          </text:list>
        </text:list-item>
      </text:list>
      <text:p text:style-name="Corpo_20_del_20_testo_20_no_20_Rientro">Una delle caratteristiche principali di EasyCPU è data dalla possibilità di eseguire il programma un’istruzione alla volta. In questa modalità, l’editor di codice visualizza l’istruzione da eseguire con uno sfondo giallo, come mostra la figura a pagina successiva:</text:p>
      <text:p text:style-name="Text_20_body"/>
      <text:p text:style-name="P17"><draw:frame draw:style-name="fr1" draw:name="Immagine5" text:anchor-type="as-char" svg:width="11.428cm" svg:height="4.789cm" draw:z-index="3"><draw:image xlink:href="Pictures/10000000000001B0000000B5FC0A573A.png" xlink:type="simple" xlink:show="embed" xlink:actuate="onLoad"/></draw:frame></text:p>
      <text:p text:style-name="Caption"><text:span text:style-name="T2">Figura </text:span><text:span text:style-name="T2"><text:sequence text:ref-name="refFigura1" text:name="Figura" text:formula="ooow:Figura+1" style:num-format="1">2</text:sequence></text:span><text:span text:style-name="T2"> Esempio di esecuzione “passo passo” di un programma.</text:span></text:p>
      <text:p text:style-name="Corpo_20_del_20_testo_20_no_20_Rientro">Nell’esempio, è già stata eseguita la prima istruzione e l’esecuzione è sospesa sulla seconda (ancora da eseguire). </text:p>
      <text:p text:style-name="Text_20_body">Esistono due comandi connessi all’esecuzione “passo passo”, spiegati di seguito. </text:p>
      <text:p text:style-name="Text_20_body"/>
      <text:p text:style-name="Corpo_20_come_20_Titolo_20_4"><text:soft-page-break/>Esegui istruzione</text:p>
      <text:p text:style-name="Corpo_20_del_20_testo_20_no_20_Rientro">Mediante:</text:p>
      <text:list xml:id="list223634480172115" text:continue-list="list223634449158515" text:style-name="WW8Num13">
        <text:list-item>
          <text:p text:style-name="Elenco_20_Quadrato">il tasto F10,</text:p>
        </text:list-item>
        <text:list-item>
          <text:p text:style-name="Elenco_20_Quadrato">il comando «Esegui | Esegui istruzione»,</text:p>
        </text:list-item>
        <text:list-item>
          <text:p text:style-name="Elenco_20_Quadrato">il bottone <draw:frame draw:style-name="fr1" draw:name="Immagine6" text:anchor-type="as-char" svg:width="0.476cm" svg:height="0.45cm" draw:z-index="4"><draw:image xlink:href="Pictures/100000000000001200000011BD94349F.png" xlink:type="simple" xlink:show="embed" xlink:actuate="onLoad"/></draw:frame></text:p>
        </text:list-item>
      </text:list>
      <text:p text:style-name="Corpo_20_del_20_testo_20_no_20_Rientro">è possibile eseguire l’istruzione corrente, evidenziata con lo sfondo giallo. Dopodiché l’esecuzione sarà sospesa sulla prossima istruzione (o terminata se non ci sono più istruzioni).</text:p>
      <text:p text:style-name="Corpo_20_come_20_Titolo_20_4">Esegui fino all’istruzione</text:p>
      <text:p text:style-name="Corpo_20_del_20_testo_20_no_20_Rientro">Mediante: </text:p>
      <text:list xml:id="list223634496177125" text:continue-numbering="true" text:style-name="WW8Num13">
        <text:list-item>
          <text:p text:style-name="Elenco_20_Quadrato">il tasto F4 e</text:p>
        </text:list-item>
        <text:list-item>
          <text:p text:style-name="Elenco_20_Quadrato">il comando «Esegui | Esegui fino a »,</text:p>
        </text:list-item>
      </text:list>
      <text:p text:style-name="Corpo_20_del_20_testo_20_no_20_Rientro">è possibile eseguire tutte le istruzioni che precedono quella selezionata, sulla quale l’esecuzione sarà sospesa. Quest’ultima è rappresentata dalla riga contenente il <text:span text:style-name="T11">cursore</text:span>, oppure dalla riga selezionata (testo bianco su sfondo blu) se è il programma è già in esecuzione.</text:p>
      <text:p text:style-name="Text_20_body">Nello screenshot che segue, l’esecuzione è sospesa sulla seconda istruzione, <text:span text:style-name="T11">mentre </text:span>l’utente ha selezionato l’ultima istruzione. <text:span text:style-name="T11">E</text:span>seguendo il comando «Esegui fino» vengono eseguite normalmente la terza e la quarta istruzione, e l’esecuzione viene sospesa sull’ultima.</text:p>
      <text:p text:style-name="Text_20_body"/>
      <text:p text:style-name="P17"><draw:frame draw:style-name="fr1" draw:name="Immagine7" text:anchor-type="as-char" svg:width="11.428cm" svg:height="4.445cm" draw:z-index="5"><draw:image xlink:href="Pictures/10000000000001B0000000A8D1934071.png" xlink:type="simple" xlink:show="embed" xlink:actuate="onLoad"/></draw:frame></text:p>
      <text:p text:style-name="Caption"><text:span text:style-name="T2">Figura </text:span><text:span text:style-name="T2"><text:sequence text:ref-name="refFigura2" text:name="Figura" text:formula="ooow:Figura+1" style:num-format="1">3</text:sequence></text:span><text:span text:style-name="T2"> Esempio <text:s/>di esecuzione “passo passo” di un programma; comando «Esegui fino a»</text:span></text:p>
      <text:p text:style-name="Corpo_20_del_20_testo_20_no_20_Rientro">Questa funzionalità consente di velocizzare il debug del programma, eseguendo normalmente parti più o meno consistenti di codice e sospendendo l’esecuzione soltanto sulle istruzioni che si desidera indagare.</text:p>
      <text:p text:style-name="Text_20_body"/>
      <text:p text:style-name="Text_20_body"/>
      <text:p text:style-name="Text_20_body"/>
      <text:p text:style-name="Text_20_body"/>
      <text:list xml:id="list223634543164205" text:continue-list="list223634480176012" text:style-name="WW8Num10">
        <text:list-item>
          <text:list>
            <text:list-item>
              <text:list>
                <text:list-item>
                  <text:h text:style-name="Heading_20_3" text:outline-level="3"><text:bookmark-start text:name="__RefHeading___Toc98492065"/><text:soft-page-break/>Continuare o arrestare l’esecuzione di un programma in modalità debug<text:bookmark-end text:name="__RefHeading___Toc98492065"/></text:h>
                </text:list-item>
              </text:list>
            </text:list-item>
          </text:list>
        </text:list-item>
      </text:list>
      <text:p text:style-name="Corpo_20_del_20_testo_20_no_20_Rientro">Durante il debug del programma è sempre possibile riprendere la normale esecuzione mediante il comando «Esegui | Esegui», oppure arrestarla mediante:</text:p>
      <text:list xml:id="list223634543168523" text:continue-list="list223634496177125" text:style-name="WW8Num13">
        <text:list-item>
          <text:p text:style-name="Elenco_20_Quadrato">il tasto MAIUSC-F5,</text:p>
        </text:list-item>
        <text:list-item>
          <text:p text:style-name="Elenco_20_Quadrato">il comando «Esegui | Stop »,</text:p>
        </text:list-item>
        <text:list-item>
          <text:p text:style-name="Elenco_20_Quadrato">il bottone <draw:frame draw:style-name="fr1" draw:name="Immagine8" text:anchor-type="as-char" svg:width="0.37cm" svg:height="0.344cm" draw:z-index="6"><draw:image xlink:href="Pictures/100000000000000E0000000D3A8D37A6.png" xlink:type="simple" xlink:show="embed" xlink:actuate="onLoad"/></draw:frame>.</text:p>
        </text:list-item>
      </text:list>
      <text:list xml:id="list223634543163014" text:continue-list="list223634543164205" text:style-name="WW8Num10">
        <text:list-item>
          <text:list>
            <text:list-item>
              <text:list>
                <text:list-item>
                  <text:h text:style-name="Heading_20_3" text:outline-level="3"><text:bookmark-start text:name="__RefHeading___Toc98492066"/>Interrompere un ciclo infinito<text:bookmark-end text:name="__RefHeading___Toc98492066"/></text:h>
                </text:list-item>
              </text:list>
            </text:list-item>
          </text:list>
        </text:list-item>
      </text:list>
      <text:p text:style-name="P7">Durante l’esecuzione di un programma, EasyCPU usa un contatore interno per verificare se la CPU si trova in un ciclo potenzialmente infinito. </text:p>
      <text:p text:style-name="P7">Quando il contatore raggiunge un numero stabilito dall’utente (vedi «Preferenze e opzioni di visualizzazione») compare la <text:span text:style-name="T12">message dialog</text:span> di figura 4, che consente all’utente di arrestare l’esecuzione, sospenderla ed entrare in modalità debug, oppure continuare l’esecuzione normalmente. In quest’ultimo caso, il contatore sarà azzerato e sarà nuovamente visualizzata la dialog nel caso raggiunga nuovamente il valore limite stabilito.</text:p>
      <text:p text:style-name="Text_20_body">Il valore limite predefinito del contatore è 65535, ma può essere modificato dall’utente.</text:p>
      <text:p text:style-name="P20"><draw:frame draw:style-name="fr1" draw:name="Immagine9" text:anchor-type="as-char" svg:width="11.852cm" svg:height="5.503cm" draw:z-index="7"><draw:image xlink:href="Pictures/10000000000001C0000000D09B0D726A.png" xlink:type="simple" xlink:show="embed" xlink:actuate="onLoad"/></draw:frame></text:p>
      <text:p text:style-name="Caption"><text:span text:style-name="T2">Figura </text:span><text:span text:style-name="T2"><text:sequence text:ref-name="refFigura3" text:name="Figura" text:formula="ooow:Figura+1" style:num-format="1">4</text:sequence></text:span><text:span text:style-name="T2"> Finestra di dialogo di gestione dei cicli infiniti.</text:span></text:p>
      <text:list xml:id="list223634558166341" text:continue-numbering="true" text:style-name="WW8Num10">
        <text:list-item>
          <text:list>
            <text:list-item>
              <text:list>
                <text:list-item>
                  <text:h text:style-name="Heading_20_3" text:outline-level="3"><text:bookmark-start text:name="__RefHeading___Toc98492067"/>Stato della CPU<text:bookmark-end text:name="__RefHeading___Toc98492067"/></text:h>
                </text:list-item>
              </text:list>
            </text:list-item>
          </text:list>
        </text:list-item>
      </text:list>
      <text:p text:style-name="Corpo_20_del_20_testo_20_no_20_Rientro">La barra di stato riporta lo stato corrente della CPU, e cioè dell’esecuzione del programma, utile soprattutto quanto si esegue il programma in modalità debug. I possibili stati sono:</text:p>
      <text:p text:style-name="Text_20_body"/>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8"><draw:frame draw:style-name="fr1" draw:name="Immagine10" text:anchor-type="as-char" svg:width="2.672cm" svg:height="0.714cm" draw:z-index="8"><draw:image xlink:href="Pictures/10000000000000650000001B24704387.png" xlink:type="simple" xlink:show="embed" xlink:actuate="onLoad"/></draw:frame></text:p>
          </table:table-cell>
          <table:table-cell table:style-name="Tabella2.A1" office:value-type="string">
            <text:p text:style-name="P23"/>
          </table:table-cell>
          <table:table-cell table:style-name="Tabella2.C1" office:value-type="string">
            <text:p text:style-name="P24">Il programma non è in esecuzione.</text:p>
          </table:table-cell>
        </table:table-row>
        <table:table-row table:style-name="Tabella2.1">
          <table:table-cell table:style-name="Tabella2.A1" office:value-type="string">
            <text:p text:style-name="P18"><draw:frame draw:style-name="fr1" draw:name="Immagine11" text:anchor-type="as-char" svg:width="2.884cm" svg:height="0.688cm" draw:z-index="9"><draw:image xlink:href="Pictures/100000000000006D0000001A24CF0DEC.png" xlink:type="simple" xlink:show="embed" xlink:actuate="onLoad"/></draw:frame></text:p>
          </table:table-cell>
          <table:table-cell table:style-name="Tabella2.A1" office:value-type="string">
            <text:p text:style-name="P22"/>
          </table:table-cell>
          <table:table-cell table:style-name="Tabella2.C1" office:value-type="string">
            <text:p text:style-name="P24">Il programma è sospeso sulla prima istruzione.</text:p>
          </table:table-cell>
        </table:table-row>
        <table:table-row table:style-name="Tabella2.1">
          <table:table-cell table:style-name="Tabella2.A1" office:value-type="string">
            <text:p text:style-name="P18"><draw:frame draw:style-name="fr1" draw:name="Immagine12" text:anchor-type="as-char" svg:width="4.207cm" svg:height="0.688cm" draw:z-index="10"><draw:image xlink:href="Pictures/100000000000009F0000001AFD1C5804.png" xlink:type="simple" xlink:show="embed" xlink:actuate="onLoad"/></draw:frame></text:p>
          </table:table-cell>
          <table:table-cell table:style-name="Tabella2.A1" office:value-type="string">
            <text:p text:style-name="P25"/>
            <text:p text:style-name="P21"/>
          </table:table-cell>
          <table:table-cell table:style-name="Tabella2.C1" office:value-type="string">
            <text:p text:style-name="P24">Il programma è sospeso su una istruzione qualsiasi </text:p>
            <text:p text:style-name="P24">dopo la prima.</text:p>
          </table:table-cell>
        </table:table-row>
      </table:table>
      <text:list xml:id="list223634652152166" text:continue-numbering="true" text:style-name="WW8Num10">
        <text:list-item>
          <text:list>
            <text:list-item>
              <text:h text:style-name="Heading_20_2" text:outline-level="2"><text:bookmark-start text:name="__RefHeading___Toc98492068"/><text:soft-page-break/>Preferenze e opzioni di visualizzazione<text:bookmark-end text:name="__RefHeading___Toc98492068"/></text:h>
            </text:list-item>
          </text:list>
        </text:list-item>
      </text:list>
      <text:p text:style-name="Corpo_20_del_20_testo_20_no_20_Rientro"><text:span text:style-name="T11">È possibile </text:span>personalizzare alcune caratteristiche dell’IDE, sia attraverso la tool bar che il menù Preferenze.</text:p>
      <text:list xml:id="list223634652158425" text:continue-numbering="true" text:style-name="WW8Num10">
        <text:list-item>
          <text:list>
            <text:list-item>
              <text:list>
                <text:list-item>
                  <text:h text:style-name="Heading_20_3" text:outline-level="3">Modalità visualizzazione</text:h>
                </text:list-item>
              </text:list>
            </text:list-item>
          </text:list>
        </text:list-item>
      </text:list>
      <text:p text:style-name="Corpo_20_del_20_testo_20_no_20_Rientro">La tool bar contiene quattro pulsanti che consentono di intervenire sulla modalità di visualizzazione di memoria, registri e stack. </text:p>
      <text:p text:style-name="Corpo_20_come_20_Titolo_20_4">Formato di visualizzazione dei dati</text:p>
      <text:p text:style-name="Corpo_20_del_20_testo_20_no_20_Rientro">Mediante i tre pulsanti <draw:frame draw:style-name="fr1" draw:name="Immagine13" text:anchor-type="as-char" svg:width="1.799cm" svg:height="0.688cm" draw:z-index="11"><draw:image xlink:href="Pictures/10000000000000440000001A2074BEC4.png" xlink:type="simple" xlink:show="embed" xlink:actuate="onLoad"/></draw:frame> è possibile stabilire se visualizzare i dati di memoria, stack e registri nel formato esadecimale, decimale <text:span text:style-name="T11">o</text:span> carattere. Esiste una parziale eccezione per i registri, i cui valori possono essere visualizzati soltanto in formato decimale o esadecimale. (Cliccando sul pulsante<draw:frame draw:style-name="fr1" draw:name="Immagine14" text:anchor-type="as-char" svg:width="0.503cm" svg:height="0.503cm" draw:z-index="12"><draw:image xlink:href="Pictures/1000000000000013000000134753CBB4.png" xlink:type="simple" xlink:show="embed" xlink:actuate="onLoad"/></draw:frame> si ottiene comunque una visualizzazione in formato decimale.)</text:p>
      <text:p text:style-name="Corpo_20_come_20_Titolo_20_4">Visualizzare/nascondere l’area di memoria</text:p>
      <text:p text:style-name="Corpo_20_del_20_testo_20_no_20_Rientro">E’ possibile visualizzare o nascondere l’area di memoria mediante il bottone <draw:frame draw:style-name="fr1" draw:name="Immagine15" text:anchor-type="as-char" svg:width="0.556cm" svg:height="0.503cm" draw:z-index="13"><draw:image xlink:href="Pictures/100000000000001500000013A5307DAF.png" xlink:type="simple" xlink:show="embed" xlink:actuate="onLoad"/></draw:frame>. </text:p>
      <text:p text:style-name="Corpo_20_come_20_Titolo_20_4">Numero di colonne di visualizzazione dello stack</text:p>
      <text:p text:style-name="Corpo_20_del_20_testo_20_no_20_Rientro">L’ultimo pulsante della toolbar consente di stabilire se visualizzare il contenuto dello stack in una o due colonne. Il pulsante ha due stati. Quando si trova nello stato <draw:frame draw:style-name="fr1" draw:name="Immagine16" text:anchor-type="as-char" svg:width="0.423cm" svg:height="0.476cm" draw:z-index="14"><draw:image xlink:href="Pictures/100000000000001000000012F099FF78.png" xlink:type="simple" xlink:show="embed" xlink:actuate="onLoad"/></draw:frame>, lo stack è visualizzato in due colonne è ed possibile passare alla visualizzazione in una colonna. Nello stato <draw:frame draw:style-name="fr1" draw:name="Immagine17" text:anchor-type="as-char" svg:width="0.423cm" svg:height="0.45cm" draw:z-index="15"><draw:image xlink:href="Pictures/100000000000001000000011CDF0F19D.png" xlink:type="simple" xlink:show="embed" xlink:actuate="onLoad"/></draw:frame> vale naturalmente l’opposto.</text:p>
      <text:list xml:id="list223634699182002" text:continue-numbering="true" text:style-name="WW8Num10">
        <text:list-item>
          <text:list>
            <text:list-item>
              <text:list>
                <text:list-item>
                  <text:h text:style-name="Heading_20_3" text:outline-level="3">Font dell’editor codice e dati</text:h>
                </text:list-item>
              </text:list>
            </text:list-item>
          </text:list>
        </text:list-item>
      </text:list>
      <text:p text:style-name="Corpo_20_del_20_testo_20_no_20_Rientro">Attraverso il comando «Preferenze | Font codice e dati…» è possibile scegliere il font da utilizzare negli editor codice e dati. La selezione del nuovo carattere avviene mediante la finestra standard «tipo carattere».</text:p>
      <text:list xml:id="list223634699167164" text:continue-numbering="true" text:style-name="WW8Num10">
        <text:list-item>
          <text:list>
            <text:list-item>
              <text:list>
                <text:list-item>
                  <text:h text:style-name="Heading_20_3" text:outline-level="3">Finestra di dialogo «Opzioni»</text:h>
                </text:list-item>
              </text:list>
            </text:list-item>
          </text:list>
        </text:list-item>
      </text:list>
      <text:p text:style-name="P7">Attraverso la finestra di dialogo «Opzioni», mostrata <text:span text:style-name="T11">a pagina successiva</text:span>, è possibile impostare gli elementi configurabili di EasyCPU. </text:p>
      <text:p text:style-name="P7">Alcuni di questi possono essere configurati anche mediante la tool bar, e precisamente: il formato di visualizzazione dei dati ed il numero di colonne di visualizzazione dello stack. Segue un breve cenno per le altre impostazioni di configurazione</text:p>
      <text:p text:style-name="Corpo_20_del_20_testo_20_no_20_Rientro"/>
      <text:p text:style-name="P17"><text:soft-page-break/><draw:frame draw:style-name="fr1" draw:name="Immagine18" text:anchor-type="as-char" svg:width="10.793cm" svg:height="8.465cm" draw:z-index="16"><draw:image xlink:href="Pictures/1000000000000198000001400B7699AA.png" xlink:type="simple" xlink:show="embed" xlink:actuate="onLoad"/></draw:frame></text:p>
      <text:p text:style-name="Caption"><text:span text:style-name="T2">Figura </text:span><text:span text:style-name="T2"><text:sequence text:ref-name="refFigura4" text:name="Figura" text:formula="ooow:Figura+1" style:num-format="1">5</text:sequence></text:span><text:span text:style-name="T2"> Finestra di dialogo Opzioni</text:span></text:p>
      <text:p text:style-name="Corpo_20_come_20_Titolo_20_4">Massimo numero di errori visualizzati</text:p>
      <text:p text:style-name="Corpo_20_del_20_testo_20_no_20_Rientro">Indica il numero massimo di errori di compilazione che vengono considerati, eventuali errori in più non saranno visualizzati. </text:p>
      <text:p text:style-name="Corpo_20_come_20_Titolo_20_4">Visualizza caratteri ‘\0’ come:</text:p>
      <text:p text:style-name="Corpo_20_del_20_testo_20_no_20_Rientro">All’interno della modalità di visualizzazione carattere consente di stabilire con quale simbolo visualizzare i caratteri con codice ASCII zero.</text:p>
      <text:p text:style-name="Corpo_20_come_20_Titolo_20_4">Margine sinistro</text:p>
      <text:p text:style-name="Corpo_20_del_20_testo_20_no_20_Rientro">Consente di stabilire il margine sinistro nell’editor di codice, e cioè il numero di spazi inseriti automaticamente quando si digitano le istruzioni nell’editor di codice.</text:p>
      <text:p text:style-name="Corpo_20_come_20_Titolo_20_4">Numero di istruzioni che prefigurano in ciclo infinito</text:p>
      <text:p text:style-name="Corpo_20_del_20_testo_20_no_20_Rientro">EasyCPU mantiene un contatore interno per ogni istruzione che consente di individuare potenziali cicli infiniti. Quando un contatore raggiunge il valore impostato, EasyCPU visualizza la dialog di interruzione ciclo infinito mostrata in figura 4.</text:p>
      <text:p text:style-name="Corpo_20_come_20_Titolo_20_4">Inizializza registri all’avvio</text:p>
      <text:p text:style-name="Corpo_20_del_20_testo_20_no_20_Rientro">Attivando questa opzioni, EasyCPU imposta automaticamente a zero il valore di tutti i registri prima di avviare l’esecuzione del programma, altrimenti li lascia nello stato prodotto dalla precedente esecu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paragraph-properties fo:margin-left="0cm" fo:margin-right="0cm" fo:margin-top="0.199cm" fo:margin-bottom="0cm" loext:contextual-spacing="false" fo:line-height="125%" fo:text-align="justify" style:justify-single-word="false" fo:orphans="2" fo:widows="2" fo:text-indent="0cm" style:auto-text-indent="false"/>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paragraph-properties fo:margin-left="0.501cm" fo:margin-right="0cm" fo:margin-top="0.176cm" fo:margin-bottom="0.176cm" loext:contextual-spacing="false" fo:text-indent="0.63cm" style:auto-text-indent="false"/>
    </style:style>
    <style:style style:name="Caption" style:family="paragraph" style:parent-style-name="Standard" style:next-style-name="Corpo_20_del_20_testo_20_no_20_Rientro" style:class="extra">
      <style:paragraph-properties fo:margin-top="0.423cm" fo:margin-bottom="0.212cm" loext:contextual-spacing="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Standard" style:class="text">
      <style:paragraph-properties fo:margin-left="2.498cm" fo:margin-right="0cm" fo:margin-top="0cm" fo:margin-bottom="1.058cm" loext:contextual-spacing="false" fo:text-align="end" style:justify-single-word="false" fo:orphans="2" fo:widows="2" fo:text-indent="0cm" style:auto-text-indent="false" fo:break-before="page" fo:keep-with-next="always"/>
      <style:text-properties fo:color="#333333" style:font-name="Arial Black" fo:font-family="'Arial Black'" style:font-family-generic="swiss" style:font-pitch="variable" fo:font-size="34pt" fo:language="it" fo:country="IT" fo:text-shadow="1pt 1pt" fo:font-weight="bold" style:letter-kerning="true" style:font-name-asian="Times New Roman" style:font-family-asian="'Times New Roman'" style:font-family-generic-asian="roman" style:font-pitch-asian="variable" style:font-size-asian="34pt" style:font-weight-asian="bold" style:font-name-complex="Arial Black" style:font-family-complex="'Arial Black'" style:font-family-generic-complex="swiss" style:font-pitch-complex="variable" style:font-size-complex="10pt" style:language-complex="ar" style:country-complex="SA"/>
    </style:style>
    <style:style style:name="Heading_20_2" style:display-name="Heading 2" style:family="paragraph" style:next-style-name="Corpo_20_del_20_testo_20_no_20_Rientro" style:default-outline-level="2" style:list-style-name="WW8Num10" style:class="text">
      <style:paragraph-properties fo:margin-left="1.02cm" fo:margin-right="0cm" fo:margin-top="1cm" fo:margin-bottom="0.349cm" loext:contextual-spacing="false" fo:orphans="2" fo:widows="2" fo:text-indent="-1.02cm" style:auto-text-indent="false" fo:keep-with-next="always"/>
      <style:text-properties fo:font-variant="small-caps" style:use-window-font-color="true" style:font-name="Arial" fo:font-family="Arial" style:font-family-generic="swiss" style:font-pitch="variable" fo:font-size="14pt" fo:language="it" fo:country="I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Heading_20_3" style:display-name="Heading 3" style:family="paragraph" style:next-style-name="Corpo_20_del_20_testo_20_no_20_Rientro" style:default-outline-level="3" style:list-style-name="WW8Num10" style:class="text">
      <style:paragraph-properties fo:margin-top="0.423cm" fo:margin-bottom="0.106cm" loext:contextual-spacing="false" fo:orphans="2" fo:widows="2" fo:keep-with-next="always"/>
      <style:text-properties style:use-window-font-color="true" style:font-name="Arial" fo:font-family="Arial" style:font-family-generic="swiss" style:font-pitch="variable" fo:font-size="12pt" fo:language="it" fo:country="I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font-style-complex="italic"/>
    </style:style>
    <style:style style:name="Heading_20_4" style:display-name="Heading 4" style:family="paragraph" style:next-style-name="Standard" style:class="text">
      <style:paragraph-properties fo:margin-top="0.423cm" fo:margin-bottom="0.106cm" loext:contextual-spacing="false" fo:orphans="2" fo:widows="2" fo:keep-with-next="always"/>
      <style:text-properties style:use-window-font-color="true" style:font-name="Times New Roman" fo:font-family="'Times New Roman'" style:font-family-generic="roman" style:font-pitch="variable" fo:font-size="12pt" fo:language="it" fo:country="I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class="text">
      <style:paragraph-properties fo:margin-top="0.423cm" fo:margin-bottom="0cm" loext:contextual-spacing="false"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text-align="end" style:justify-single-word="false" fo:break-before="page" fo:keep-with-next="always"/>
      <style:text-properties fo:font-size="14pt" fo:font-weight="bold" style:font-size-asian="14pt" style:font-weight-asian="bold" style:font-weight-complex="bold"/>
    </style:style>
    <style:style style:name="Codice_20_C_23_" style:display-name="Codice C#" style:family="paragraph" style:parent-style-name="Text_20_body">
      <style:paragraph-properties fo:margin-left="0cm" fo:margin-right="0cm" fo:line-height="140%" fo:text-align="start" style:justify-single-word="false" fo:text-indent="0cm" style:auto-text-indent="false">
        <style:tab-stops>
          <style:tab-stop style:position="0.75cm"/>
          <style:tab-stop style:position="1.501cm"/>
          <style:tab-stop style:position="2.251cm"/>
          <style:tab-stop style:position="3cm"/>
          <style:tab-stop style:position="3.75cm"/>
          <style:tab-stop style:position="4.501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Algoritmi" style:family="paragraph" style:parent-style-name="Codice_20_C_23_">
      <style:paragraph-properties fo:margin-top="0.212cm" fo:margin-bottom="0cm" loext:contextual-spacing="false">
        <style:tab-stops>
          <style:tab-stop style:position="0.75cm"/>
          <style:tab-stop style:position="1.501cm"/>
          <style:tab-stop style:position="2.251cm"/>
          <style:tab-stop style:position="3cm"/>
          <style:tab-stop style:position="3.75cm"/>
          <style:tab-stop style:position="4.501cm"/>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Codice_20_C_23__20_Grassetto_20_e_20_centrato" style:display-name="Codice C# Grassetto e centrato" style:family="paragraph" style:parent-style-name="Codice_20_C_23_">
      <style:paragraph-properties fo:text-align="center" style:justify-single-word="false"/>
      <style:text-properties fo:font-weight="bold" style:font-weight-asian="bold"/>
    </style:style>
    <style:style style:name="Algoritmi_20_Grassetto_20_e_20_centrato" style:display-name="Algoritmi Grassetto e centrato" style:family="paragraph" style:parent-style-name="Codice_20_C_23__20_Grassetto_20_e_20_centrato">
      <style:paragraph-properties fo:margin-top="0.212cm" fo:margin-bottom="0cm" loext:contextual-spacing="false">
        <style:tab-stops>
          <style:tab-stop style:position="0.75cm"/>
          <style:tab-stop style:position="1.501cm"/>
          <style:tab-stop style:position="2.251cm"/>
          <style:tab-stop style:position="3cm"/>
          <style:tab-stop style:position="3.75cm"/>
          <style:tab-stop style:position="4.501cm"/>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Algoritmi_20_maiuscoletto" style:display-name="Algoritmi maiuscoletto" style:family="paragraph" style:parent-style-name="Standard">
      <style:paragraph-properties fo:margin-top="0.212cm" fo:margin-bottom="0cm" loext:contextual-spacing="false">
        <style:tab-stops>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Corpo_20_come_20_Titolo_20_2" style:display-name="Corpo come Titolo 2" style:family="paragraph" style:parent-style-name="Text_20_body">
      <style:paragraph-properties fo:margin-left="0cm" fo:margin-right="0cm" fo:margin-top="0.423cm" fo:margin-bottom="0.282cm" loext:contextual-spacing="false" fo:text-indent="0cm" style:auto-text-indent="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rpo_20_come_20_Titolo_20_3" style:display-name="Corpo come Titolo 3" style:family="paragraph" style:parent-style-name="Corpo_20_come_20_Titolo_20_2"/>
    <style:style style:name="Corpo_20_come_20_Titolo_20_4" style:display-name="Corpo come Titolo 4" style:family="paragraph" style:parent-style-name="Text_20_body" style:next-style-name="Corpo_20_del_20_testo_20_no_20_Rientro">
      <style:paragraph-properties fo:margin-left="0cm" fo:margin-right="0cm" fo:margin-top="0.353cm" fo:margin-bottom="0cm" loext:contextual-spacing="false" fo:text-indent="0cm" style:auto-text-indent="false"/>
      <style:text-properties style:font-name="Verdana" fo:font-family="Verdana" style:font-family-generic="swiss" style:font-pitch="variable" fo:font-style="italic" style:font-style-asian="italic" style:font-name-complex="Verdana" style:font-family-complex="Verdana" style:font-family-generic-complex="swiss" style:font-pitch-complex="variable"/>
    </style:style>
    <style:style style:name="Corpo_20_del_20_testo_20_2" style:display-name="Corpo del testo 2" style:family="paragraph" style:parent-style-name="Standard">
      <style:paragraph-properties fo:margin-top="0.28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rpo_20_del_20_testo_20_no_20_Rientro" style:display-name="Corpo del testo no Rientro" style:family="paragraph" style:parent-style-name="Text_20_body" style:next-style-name="Text_20_body">
      <style:paragraph-properties fo:margin-left="0cm" fo:margin-right="0cm" fo:margin-top="0.212cm" fo:margin-bottom="0cm" loext:contextual-spacing="false" fo:text-indent="0cm" style:auto-text-indent="false"/>
    </style:style>
    <style:style style:name="Corpo_20_testo_20_x_20_tabelle" style:display-name="Corpo testo x tabelle" style:family="paragraph" style:parent-style-name="Text_20_body">
      <style:paragraph-properties fo:margin-left="0cm" fo:margin-right="0cm" fo:text-indent="0cm"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Definizione" style:family="paragraph" style:parent-style-name="Text_20_body" style:next-style-name="Corpo_20_del_20_testo_20_no_20_Rientro">
      <style:paragraph-properties fo:margin-left="0cm" fo:margin-right="0cm" fo:margin-top="0.353cm" fo:margin-bottom="0.176cm" loext:contextual-spacing="false" fo:text-indent="0cm" style:auto-text-indent="false"/>
      <style:text-properties style:font-name="Verdana" fo:font-family="Verdana" style:font-family-generic="swiss" style:font-pitch="variable" fo:font-size="10pt" fo:font-weight="bold" style:font-size-asian="10pt" style:font-weight-asian="bold" style:font-name-complex="Verdana" style:font-family-complex="Verdana" style:font-family-generic-complex="swiss" style:font-pitch-complex="variable"/>
    </style:style>
    <style:style style:name="Addressee" style:family="paragraph" style:parent-style-name="Heading_20_2" style:default-outline-level="" style:list-style-name="" style:class="extra">
      <style:paragraph-properties fo:margin-left="0cm" fo:margin-right="0cm" fo:margin-top="1.411cm" fo:margin-bottom="0cm" loext:contextual-spacing="false" fo:line-height="150%" fo:text-align="end" style:justify-single-word="false" fo:text-indent="0cm" style:auto-text-indent="false"/>
      <style:text-properties fo:font-variant="normal" fo:text-transform="none" fo:color="#000000" style:font-name="Times New Roman" fo:font-family="'Times New Roman'" style:font-family-generic="roman" style:font-pitch="variable" fo:font-style="italic" fo:font-weight="normal" style:font-style-asian="italic" style:font-weight-asian="normal" style:font-name-complex="Times New Roman" style:font-family-complex="'Times New Roman'" style:font-family-generic-complex="roman" style:font-pitch-complex="variable"/>
    </style:style>
    <style:style style:name="Elenco_20_Quadrato" style:display-name="Elenco Quadrato" style:family="paragraph" style:parent-style-name="List" style:list-style-name="WW8Num13">
      <style:paragraph-properties fo:margin-left="1.769cm" fo:margin-right="0cm" fo:text-indent="-0.63cm" style:auto-text-indent="false"/>
    </style:style>
    <style:style style:name="Elenco_20_Lettera" style:display-name="Elenco Lettera" style:family="paragraph" style:parent-style-name="Elenco_20_Quadrato" style:list-style-name="WW8Num1"/>
    <style:style style:name="Sintassi_20_codice" style:display-name="Sintassi codice" style:family="paragraph" style:parent-style-name="Codice_20_C_23_" style:next-style-name="Corpo_20_del_20_testo_20_no_20_Rientro">
      <style:paragraph-properties fo:margin-top="0.353cm" fo:margin-bottom="0cm" loext:contextual-spacing="false" fo:text-align="center" style:justify-single-word="false"/>
    </style:style>
    <style:style style:name="Elenco_20_Numeri" style:display-name="Elenco Numeri" style:family="paragraph" style:parent-style-name="Elenco_20_Lettera" style:list-style-name="WW8Num18"/>
    <style:style style:name="Elenco_20_Pallino" style:display-name="Elenco Pallino" style:family="paragraph" style:parent-style-name="List" style:list-style-name="WW8Num25">
      <style:paragraph-properties fo:margin-top="0.353cm" fo:margin-bottom="0.176cm" loext:contextual-spacing="false"/>
    </style:style>
    <style:style style:name="Inizio_20_Codice" style:display-name="Inizio Codice" style:family="paragraph" style:parent-style-name="Codice_20_C_23_" style:next-style-name="Codice_20_C_23_">
      <style:paragraph-properties fo:margin-top="0.353cm" fo:margin-bottom="0cm" loext:contextual-spacing="false" fo:padding-left="0cm" fo:padding-right="0cm" fo:padding-top="0.035cm" fo:padding-bottom="0cm" fo:border-left="none" fo:border-right="none" fo:border-top="0.51pt solid #000000" fo:border-bottom="none">
        <style:tab-stops>
          <style:tab-stop style:position="0.75cm"/>
          <style:tab-stop style:position="1.501cm"/>
          <style:tab-stop style:position="2.251cm"/>
          <style:tab-stop style:position="3cm"/>
          <style:tab-stop style:position="3.75cm"/>
          <style:tab-stop style:position="4.501cm"/>
          <style:tab-stop style:position="13.503cm" style:type="right"/>
        </style:tab-stops>
      </style:paragraph-properties>
    </style:style>
    <style:style style:name="Fine_20_Codice" style:display-name="Fine Codice" style:family="paragraph" style:parent-style-name="Inizio_20_Codice" style:next-style-name="Corpo_20_del_20_testo_20_no_20_Rientro">
      <style:paragraph-properties fo:margin-top="0cm" fo:margin-bottom="0.176cm" loext:contextual-spacing="false" fo:padding-left="0cm" fo:padding-right="0cm" fo:padding-top="0cm" fo:padding-bottom="0.035cm" fo:border-left="none" fo:border-right="none" fo:border-top="none" fo:border-bottom="0.51pt solid #000000">
        <style:tab-stops>
          <style:tab-stop style:position="0.75cm"/>
          <style:tab-stop style:position="2.251cm"/>
          <style:tab-stop style:position="3cm"/>
          <style:tab-stop style:position="3.75cm"/>
          <style:tab-stop style:position="4.501cm"/>
          <style:tab-stop style:position="13.503cm" style:type="right"/>
        </style:tab-stops>
      </style:paragraph-properties>
    </style:style>
    <style:style style:name="Inizio_20_Algoritmo" style:display-name="Inizio Algoritmo" style:family="paragraph" style:parent-style-name="Text_20_body">
      <style:paragraph-properties fo:padding-left="0cm" fo:padding-right="0cm" fo:padding-top="0cm" fo:padding-bottom="0.035cm" fo:border-left="none" fo:border-right="none" fo:border-top="none" fo:border-bottom="0.51pt solid #000000"/>
    </style:style>
    <style:style style:name="Header" style:family="paragraph" style:parent-style-name="Standard" style:class="extra">
      <style:paragraph-properties fo:margin-top="0cm" fo:margin-bottom="0.423cm" loext:contextual-spacing="false" fo:padding-left="0cm" fo:padding-right="0cm" fo:padding-top="0cm" fo:padding-bottom="0.035cm" fo:border-left="none" fo:border-right="none" fo:border-top="none" fo:border-bottom="0.51pt solid #000000">
        <style:tab-stops>
          <style:tab-stop style:position="8.5cm" style:type="center"/>
          <style:tab-stop style:position="17cm" style:type="right"/>
        </style:tab-stops>
      </style:paragraph-properties>
    </style:style>
    <style:style style:name="Riquadro_20_grigio" style:display-name="Riquadro grigio" style:family="paragraph" style:parent-style-name="Text_20_body" style:next-style-name="Riquadro_20_grigio_20_corpo_20_testo">
      <style:paragraph-properties fo:margin-left="0.25cm" fo:margin-right="0.245cm" fo:margin-top="0.353cm" fo:margin-bottom="0cm" loext:contextual-spacing="false" fo:line-height="100%" fo:text-indent="0cm" style:auto-text-indent="false" fo:background-color="#e5e5e5" style:border-line-width-left="0.053cm 0.026cm 0.026cm" style:border-line-width-right="0.026cm 0.026cm 0.053cm" style:border-line-width-top="0.053cm 0.026cm 0.026cm" style:border-line-width-bottom="0.026cm 0.026cm 0.053cm" fo:padding-left="0.141cm" fo:padding-right="0.141cm" fo:padding-top="0.035cm" fo:padding-bottom="0.035cm" fo:border-left="3pt double #808080" fo:border-right="3pt double #808080" fo:border-top="3pt double #808080" fo:border-bottom="3pt double #808080">
        <style:background-image/>
      </style:paragraph-properties>
      <style:text-properties style:font-name="Verdana" fo:font-family="Verdana" style:font-family-generic="swiss" style:font-pitch="variable" fo:font-size="9pt" fo:language="en" fo:country="GB" style:font-size-asian="9pt" style:font-name-complex="Verdana" style:font-family-complex="Verdana" style:font-family-generic-complex="swiss" style:font-pitch-complex="variable"/>
    </style:style>
    <style:style style:name="SottoTitolo_20_1" style:display-name="SottoTitolo 1" style:family="paragraph">
      <style:paragraph-properties fo:margin-left="3.501cm" fo:margin-right="0cm" fo:margin-top="1.058cm" fo:margin-bottom="0.212cm" loext:contextual-spacing="false" fo:orphans="2" fo:widows="2" fo:text-indent="0cm" style:auto-text-indent="false"/>
      <style:text-properties style:use-window-font-color="true" style:font-name="Arial" fo:font-family="Arial" style:font-family-generic="swiss" style:font-pitch="variable" fo:font-size="16pt" fo:language="it" fo:country="IT"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SottoTitolo_20_2" style:display-name="SottoTitolo 2" style:family="paragraph" style:parent-style-name="SottoTitolo_20_1">
      <style:paragraph-properties fo:margin-left="5.001cm" fo:margin-right="0cm" fo:margin-top="0.423cm" fo:margin-bottom="0.212cm" loext:contextual-spacing="false" fo:text-indent="0cm" style:auto-text-indent="false"/>
      <style:text-properties fo:font-weight="normal" style:font-weight-asian="normal"/>
    </style:style>
    <style:style style:name="Titolo_20_2_20_Inverso" style:display-name="Titolo 2 Inverso" style:family="paragraph" style:parent-style-name="Heading_20_2" style:next-style-name="Corpo_20_come_20_Titolo_20_2" style:default-outline-level="" style:list-style-name="">
      <style:paragraph-properties fo:background-color="#c0c0c0">
        <style:background-image/>
      </style:paragraph-properties>
      <style:text-properties fo:color="#ffffff"/>
    </style:style>
    <style:style style:name="Riquadro_20_grigio_20_corpo_20_testo" style:display-name="Riquadro grigio corpo testo" style:family="paragraph" style:parent-style-name="Riquadro_20_grigio">
      <style:paragraph-properties fo:margin-left="0.25cm" fo:margin-right="0.245cm" fo:margin-top="0cm" fo:margin-bottom="0cm" loext:contextual-spacing="false" fo:text-indent="0.501cm" style:auto-text-indent="false"/>
    </style:style>
    <style:style style:name="Output_20_console" style:display-name="Output console" style:family="paragraph" style:parent-style-name="Codice_20_C_23_" style:next-style-name="Corpo_20_del_20_testo_20_no_20_Rientro">
      <style:paragraph-properties fo:margin-top="0.353cm" fo:margin-bottom="0.176cm" loext:contextual-spacing="false"/>
      <style:text-properties fo:font-weight="bold" style:font-weight-asian="bold"/>
    </style:style>
    <style:style style:name="Titoli_20_tabella" style:display-name="Titoli tabella" style:family="paragraph" style:parent-style-name="Corpo_20_testo_20_x_20_tabelle">
      <style:paragraph-properties fo:text-align="center" style:justify-single-word="false"/>
      <style:text-properties fo:font-variant="small-caps" fo:font-weight="bold" style:font-weight-asian="bold"/>
    </style:style>
    <style:style style:name="Corpo_20_testo_20_titoli_20_x_20_tabelle" style:display-name="Corpo testo titoli x tabelle" style:family="paragraph" style:parent-style-name="Corpo_20_testo_20_x_20_tabelle">
      <style:paragraph-properties fo:text-align="center" style:justify-single-word="false"/>
      <style:text-properties fo:font-variant="small-caps" fo:font-weight="bold" style:font-weight-asian="bold"/>
    </style:style>
    <style:style style:name="Singola_20_riga_20_codice_20_C_23_" style:display-name="Singola riga codice C#" style:family="paragraph" style:parent-style-name="Codice_20_C_23_">
      <style:paragraph-properties fo:margin-top="0.353cm" fo:margin-bottom="0.176cm" loext:contextual-spacing="false"/>
    </style:style>
    <style:style style:name="Codice_20_C_23__20_-_20_singola_20_riga" style:display-name="Codice C# - singola riga" style:family="paragraph" style:parent-style-name="Codice_20_C_23_" style:next-style-name="Corpo_20_del_20_testo_20_no_20_Rientro">
      <style:paragraph-properties fo:margin-top="0.353cm" fo:margin-bottom="0.176cm" loext:contextual-spacing="false"/>
    </style:style>
    <style:style style:name="Stile1" style:family="paragraph" style:parent-style-name="Codice_20_C_23_" style:next-style-name="Codice_20_C_23_">
      <style:paragraph-properties fo:margin-top="0.176cm" fo:margin-bottom="0cm" loext:contextual-spacing="false"/>
    </style:style>
    <style:style style:name="Definizione_20_problema" style:display-name="Definizione problema" style:family="paragraph" style:parent-style-name="Definizione" style:next-style-name="Corpo_20_del_20_testo_20_no_20_Rientro">
      <style:text-properties fo:font-weight="normal" style:font-weight-asian="normal"/>
    </style:style>
    <style:style style:name="Footnote" style:family="paragraph" style:parent-style-name="Standard" style:class="extra">
      <style:paragraph-properties fo:text-align="justify" style:justify-single-word="false"/>
    </style:style>
    <style:style style:name="Codice_20_C_23__20_iniziale" style:display-name="Codice C# iniziale" style:family="paragraph" style:parent-style-name="Codice_20_C_23_" style:next-style-name="Codice_20_C_23_">
      <style:paragraph-properties fo:margin-top="0.176cm" fo:margin-bottom="0cm" loext:contextual-spacing="false"/>
    </style:style>
    <style:style style:name="Corpo_20_testo_20_come_20_elenco_20_no_20_rientro" style:display-name="Corpo testo come elenco no rientro" style:family="paragraph" style:parent-style-name="Corpo_20_del_20_testo_20_no_20_Rientro" style:next-style-name="Corpo_20_testo_20_come_20_elenco">
      <style:paragraph-properties fo:margin-left="1.131cm" fo:margin-right="0cm" fo:text-indent="0cm" style:auto-text-indent="false"/>
    </style:style>
    <style:style style:name="Corpo_20_testo_20_come_20_elenco" style:display-name="Corpo testo come elenco" style:family="paragraph" style:parent-style-name="Text_20_body">
      <style:paragraph-properties fo:margin-left="1.131cm" fo:margin-right="0cm" fo:text-indent="0cm" style:auto-text-indent="false"/>
    </style:style>
    <style:style style:name="definizione_20_formale" style:display-name="definizione formale" style:family="paragraph" style:parent-style-name="Definizione">
      <style:paragraph-properties fo:margin-left="2.501cm" fo:margin-right="1cm" fo:text-indent="-2.501cm" style:auto-text-indent="false"/>
    </style:style>
    <style:style style:name="Intestazione_20_schema_20_o_20_figura" style:display-name="Intestazione schema o figura" style:family="paragraph" style:parent-style-name="Corpo_20_del_20_testo_20_no_20_Rientro" style:next-style-name="Fine_20_schema_20_o_20_figura">
      <style:paragraph-properties fo:margin-top="0.176cm" fo:margin-bottom="0cm" loext:contextual-spacing="false" fo:line-height="100%" fo:padding-left="0cm" fo:padding-right="0cm" fo:padding-top="0.035cm" fo:padding-bottom="0cm" fo:border-left="none" fo:border-right="none" fo:border-top="2.24pt solid #808080" fo:border-bottom="non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Fine_20_schema_20_o_20_figura" style:display-name="Fine schema o figura" style:family="paragraph" style:parent-style-name="Corpo_20_del_20_testo_20_no_20_Rientro" style:next-style-name="Corpo_20_del_20_testo_20_no_20_Rientro">
      <style:paragraph-properties fo:margin-top="0cm" fo:margin-bottom="0.176cm" loext:contextual-spacing="false" fo:line-height="100%" fo:padding-left="0cm" fo:padding-right="0cm" fo:padding-top="0cm" fo:padding-bottom="0.035cm" fo:border-left="none" fo:border-right="none" fo:border-top="none" fo:border-bottom="2.24pt solid #808080"/>
    </style:style>
    <style:style style:name="testo_20_esercizio" style:display-name="testo esercizio" style:family="paragraph" style:parent-style-name="List" style:list-style-name="WW8Num3">
      <style:paragraph-properties fo:margin-top="0.635cm" fo:margin-bottom="0.176cm" loext:contextual-spacing="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Intestazione_20_tabella" style:display-name="Intestazione tabella" style:family="paragraph" style:parent-style-name="Intestazione_20_schema_20_o_20_figura" style:next-style-name="Fine_20_tabella">
      <style:paragraph-properties fo:margin-top="0.176cm" fo:margin-bottom="0.353cm" loext:contextual-spacing="false"/>
    </style:style>
    <style:style style:name="Fine_20_tabella" style:display-name="Fine tabella" style:family="paragraph" style:parent-style-name="Fine_20_schema_20_o_20_figura" style:next-style-name="Corpo_20_del_20_testo_20_no_20_Rientro">
      <style:paragraph-properties fo:margin-top="0.176cm" fo:margin-bottom="0.176cm" loext:contextual-spacing="false"/>
    </style:style>
    <style:style style:name="Corpo_20_del_20_testo_20_3" style:display-name="Corpo del testo 3" style:family="paragraph" style:parent-style-name="Standard">
      <style:text-properties fo:font-size="8pt" style:font-size-asian="8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fo:font-size="14pt" style:font-size-asian="14pt"/>
    </style:style>
    <style:style style:name="testo_20_esercizio_20_non_20_elenco" style:display-name="testo esercizio non elenco" style:family="paragraph" style:parent-style-name="testo_20_esercizio" style:list-style-name="">
      <style:paragraph-properties fo:margin-left="0cm" fo:margin-right="0cm" fo:text-indent="0cm" style:auto-text-indent="false"/>
    </style:style>
    <style:style style:name="Tabella_20_punteggi" style:display-name="Tabella punteggi" style:family="paragraph">
      <style:paragraph-properties fo:orphans="2" fo:widows="2"/>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mpito" style:family="paragraph" style:parent-style-name="Text_20_body">
      <style:paragraph-properties fo:margin-left="0cm" fo:margin-right="0cm" fo:line-height="100%" fo:text-align="start" style:justify-single-word="false" fo:text-indent="0cm" style:auto-text-indent="false"/>
      <style:text-properties fo:font-size="10pt" style:font-size-asian="10pt"/>
    </style:style>
    <style:style style:name="Istruzione_20_SQL" style:display-name="Istruzione SQL" style:family="paragraph" style:next-style-name="Istruzione_20_SQL2">
      <style:paragraph-properties fo:margin-top="0.212cm" fo:margin-bottom="0.212cm" loext:contextual-spacing="false" fo:orphans="2" fo:widows="2"/>
      <style:text-properties style:use-window-font-color="true" style:font-name="Verdana" fo:font-family="Verdana" style:font-family-generic="swiss" style:font-pitch="variable" fo:font-size="10pt" fo:language="it" fo:country="IT"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Istruzione_20_SQL_22_" style:display-name="Istruzione SQL&quot;" style:family="paragraph" style:parent-style-name="Istruzione_20_SQL">
      <style:paragraph-properties fo:margin-top="0cm" fo:margin-bottom="0.212cm" loext:contextual-spacing="false"/>
      <style:text-properties fo:language="en" fo:country="GB"/>
    </style:style>
    <style:style style:name="Istruzione_20_SQL2" style:display-name="Istruzione SQL2" style:family="paragraph" style:parent-style-name="Istruzione_20_SQL">
      <style:paragraph-properties fo:margin-top="0cm" fo:margin-bottom="0.212cm" loext:contextual-spacing="false"/>
      <style:text-properties fo:language="en" fo:country="GB"/>
    </style:style>
    <style:style style:name="DidascaliaMia" style:family="paragraph" style:parent-style-name="Caption" style:next-style-name="Corpo_20_del_20_testo_20_no_20_Rientro">
      <style:paragraph-properties fo:text-align="justify" style:justify-single-word="false"/>
    </style:style>
    <style:style style:name="Titolo1Appendice" style:family="paragraph" style:parent-style-name="Heading_20_1" style:next-style-name="Standard">
      <style:text-properties fo:color="#808080" style:font-name="Arial Black" fo:font-family="'Arial Black'" style:font-family-generic="swiss" style:font-pitch="variable" fo:font-size="36pt" style:font-size-asian="36pt" style:font-name-complex="Arial Black" style:font-family-complex="'Arial Black'" style:font-family-generic-complex="swiss" style:font-pitch-complex="variable"/>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indent="0cm" style:auto-text-indent="false"/>
      <style:text-properties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attere_20_predefinito_20_paragrafo" style:display-name="Carattere predefinito paragrafo" style:family="text"/>
    <style:style style:name="Riferimento_20_a" style:display-name="Riferimento a" style:family="text" style:parent-style-name="Carattere_20_predefinito_20_paragrafo">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Internet_20_link" style:display-name="Internet link" style:family="text" style:parent-style-name="Riferimento_20_a">
      <style:text-properties fo:color="#0000ff" style:text-line-through-style="none" style:text-line-through-type="none" style:text-underline-style="none"/>
    </style:style>
    <style:style style:name="Visited_20_Internet_20_Link" style:display-name="Visited Internet Link" style:family="text" style:parent-style-name="Internet_20_link">
      <style:text-properties fo:color="#800080"/>
    </style:style>
    <style:style style:name="caratteri_20_curier_20_10" style:display-name="caratteri curier 10" style:family="text" style:parent-style-name="Carattere_20_predefinito_20_paragrafo">
      <style:text-properties style:font-name="Courier New" fo:font-family="'Courier New'" style:font-family-generic="modern" fo:font-size="10pt" style:font-size-asian="10pt" style:font-name-complex="Courier New" style:font-family-complex="'Courier New'" style:font-family-generic-complex="modern"/>
    </style:style>
    <style:style style:name="Curier_20_New_20_10" style:display-name="Curier New 10" style:family="text" style:parent-style-name="Carattere_20_predefinito_20_paragrafo">
      <style:text-properties style:font-name="Courier New" fo:font-family="'Courier New'" style:font-family-generic="modern" fo:font-size="10pt" style:font-size-asian="10pt" style:font-name-complex="Courier New" style:font-family-complex="'Courier New'" style:font-family-generic-complex="modern"/>
    </style:style>
    <style:style style:name="Sigle_20_e_20_comandi_20_IDE" style:display-name="Sigle e comandi IDE" style:family="text" style:parent-style-name="Carattere_20_predefinito_20_paragrafo">
      <style:text-properties fo:font-variant="small-cap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Page_20_Number" style:display-name="Page Number" style:family="text" style:parent-style-name="Carattere_20_predefinito_20_paragrafo"/>
    <style:style style:name="SQL_20_nel_20_Testo" style:display-name="SQL nel Testo" style:family="text" style:parent-style-name="Carattere_20_predefinito_20_paragrafo">
      <style:text-properties fo:font-variant="small-cap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parent-style-name="Carattere_20_predefinito_20_paragrafo">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0z0" style:num-format="A" style:num-letter-sync="true">
        <style:list-level-properties text:list-level-position-and-space-mode="label-alignment">
          <style:list-level-label-alignment text:label-followed-by="nothing" fo:text-indent="-0.762cm" fo:margin-left="0.762cm"/>
        </style:list-level-properties>
      </text:outline-level-style>
      <text:outline-level-style text:level="2" text:style-name="WW8Num10z0"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0z0" style:num-format="1" text:display-levels="2">
        <style:list-level-properties text:list-level-position-and-space-mode="label-alignment">
          <style:list-level-label-alignment text:label-followed-by="space" fo:text-indent="-1cm" fo:margin-left="1cm"/>
        </style:list-level-properties>
      </text:outline-level-style>
      <text:outline-level-style text:level="4" text:style-name="WW8Num10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0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0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0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0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0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A" style:num-letter-sync="true">
        <style:list-level-properties text:list-level-position-and-space-mode="label-alignment">
          <style:list-level-label-alignment text:label-followed-by="nothing" fo:text-indent="-0.762cm" fo:margin-left="0.762cm"/>
        </style:list-level-properties>
      </text:list-level-style-number>
      <text:list-level-style-number text:level="2" text:style-name="WW8Num9z0"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0" style:num-format="1" text:display-levels="2">
        <style:list-level-properties text:list-level-position-and-space-mode="label-alignment">
          <style:list-level-label-alignment text:label-followed-by="space" fo:text-indent="-1cm" fo:margin-left="1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A" style:num-letter-sync="true">
        <style:list-level-properties text:list-level-position-and-space-mode="label-alignment">
          <style:list-level-label-alignment text:label-followed-by="nothing" fo:text-indent="-0.762cm" fo:margin-left="0.762cm"/>
        </style:list-level-properties>
      </text:list-level-style-number>
      <text:list-level-style-number text:level="2" text:style-name="WW8Num10z0"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0" style:num-format="1" text:display-levels="2">
        <style:list-level-properties text:list-level-position-and-space-mode="label-alignment">
          <style:list-level-label-alignment text:label-followed-by="space" fo:text-indent="-1cm" fo:margin-left="1cm"/>
        </style:list-level-properties>
      </text:list-level-style-number>
      <text:list-level-style-number text:level="4" text:style-name="WW8Num1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A" style:num-letter-sync="true">
        <style:list-level-properties text:list-level-position-and-space-mode="label-alignment">
          <style:list-level-label-alignment text:label-followed-by="nothing" fo:text-indent="-0.762cm" fo:margin-left="0.762cm"/>
        </style:list-level-properties>
      </text:list-level-style-number>
      <text:list-level-style-number text:level="2" text:style-name="WW8Num14z0"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2">
        <style:list-level-properties text:list-level-position-and-space-mode="label-alignment">
          <style:list-level-label-alignment text:label-followed-by="space" fo:text-indent="-1cm" fo:margin-left="1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905cm" fo:text-indent="-1cm" fo:margin-left="1cm"/>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2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501cm" fo:margin-bottom="1.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_20_1" style:display-name="Converti 1" style:page-layout-name="Mpm2" style:next-style-name="Converti_20_2"/>
    <style:master-page style:name="Converti_20_2" style:display-name="Converti 2" style:page-layout-name="Mpm1"/>
    <style:master-page style:name="Converti_20_3" style:display-name="Converti 3" style:page-layout-name="Mpm2" style:next-style-name="Converti_20_4"/>
    <style:master-page style:name="Converti_20_4" style:display-name="Converti 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ema dsi documentazione dei progetti dell’area “Programmazione”</dc:title>
    <meta:initial-creator>bombarda</meta:initial-creator>
    <meta:creation-date>2004-11-14T23:20:00</meta:creation-date>
    <dc:creator>Paolo Meozzi</dc:creator>
    <dc:date>2015-01-23T22:36:34.195000000</dc:date>
    <meta:editing-cycles>499</meta:editing-cycles>
    <meta:editing-duration>P1DT9H27M27S</meta:editing-duration>
    <meta:generator>LibreOffice/4.3.1.2$Windows_x86 LibreOffice_project/958349dc3b25111dbca392fbc281a05559ef6848</meta:generator>
    <meta:document-statistic meta:table-count="1" meta:image-count="17" meta:object-count="0" meta:page-count="12" meta:paragraph-count="146" meta:word-count="1798" meta:character-count="11886" meta:non-whitespace-character-count="10229"/>
  </office:meta>
</office:document-meta>
</file>